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530000058AB89F4DDB.png" manifest:media-type="image/png"/>
  <manifest:file-entry manifest:full-path="Pictures/10000001000004450000058946CD617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autorizaTFG">
      <style:paragraph-properties style:page-number="auto"/>
    </style:style>
    <style:style style:name="P2" style:family="paragraph" style:parent-style-name="UBu_5f_Autoriza" style:master-page-name="autorizaTFG">
      <style:paragraph-properties style:page-number="auto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dfb2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Marco3" text:anchor-type="paragraph" svg:width="13cm" draw:z-index="0"><draw:text-box fo:min-height="0.499cm"><text:p text:style-name="P2"><text:span text:style-name="UBu_5f_gr"><text:span text:style-name="T1">D. </text:span></text:span><text:span text:style-name="UBu_5f_gr"><text:span text:style-name="T2">José Manuel Saíz Díez</text:span></text:span><text:span text:style-name="UBu_5f_gr"><text:span text:style-name="T1">, profesor del departamento de Ingeniería &lt;...&gt;, área de &lt;...&gt;</text:span></text:span></text:p><text:p text:style-name="UBu_5f_Autoriza"><text:span text:style-name="UBu_5f_gr"><text:span text:style-name="T1"/></text:span></text:p><text:p text:style-name="UBu_5f_Autoriza"><text:span text:style-name="UBu_5f_gr"><text:span text:style-name="T1">Expone:</text:span></text:span></text:p><text:p text:style-name="UBu_5f_Autoriza"><text:span text:style-name="UBu_5f_gr"><text:span text:style-name="T1"/></text:span></text:p><text:p text:style-name="UBu_5f_Autoriza"><text:span text:style-name="UBu_5f_gr"><text:span text:style-name="T1">Que el alumno D. </text:span></text:span><text:span text:style-name="UBu_5f_gr"><text:span text:style-name="T2">Yobana Nido Álvarez</text:span></text:span><text:span text:style-name="UBu_5f_gr"><text:span text:style-name="T1">, con DNI </text:span></text:span><text:span text:style-name="UBu_5f_gr"><text:span text:style-name="T2">53556414V</text:span></text:span><text:span text:style-name="UBu_5f_gr"><text:span text:style-name="T1">, ha realizado el </text:span></text:span><text:span text:style-name="UBu_5f_gr"><text:span text:style-name="T1"><text:subject>Trabajo final del GºIng.Informática</text:subject></text:span></text:span><text:span text:style-name="UBu_5f_gr"><text:span text:style-name="T1"><text:s/>titulado: </text:span></text:span><text:span text:style-name="UBu_5f_gr"><text:span text:style-name="T2">SIEM ligero, Polvorín Militar (simulado)</text:span></text:span><text:span text:style-name="UBu_5f_gr"><text:span text:style-name="T1">.</text:span></text:span></text:p><text:p text:style-name="UBu_5f_Autoriza"><text:span text:style-name="UBu_5f_gr"><text:span text:style-name="T1"/></text:span></text:p><text:p text:style-name="UBu_5f_Autoriza"><text:span text:style-name="UBu_5f_gr"><text:span text:style-name="T1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1"/></text:span></text:p><text:p text:style-name="UBu_5f_Pie_5f_Portada"><text:span text:style-name="UBu_5f_gr"><text:span text:style-name="T1">En Burgos a <text:s text:c="3"/>de </text:span></text:span><text:span text:style-name="UBu_5f_gr"><text:span text:style-name="T2">junio de 2026</text:span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><text:user-defined style:data-style-name="N0" text:name="Tutor">&lt;nombre_tutor&gt;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family="'Liberation Serif'" style:font-style-name="Predeterminado" style:font-family-generic="roman" style:font-pitch="variable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family="Garamond" style:font-style-name="Predeterminado" style:font-family-generic="roman" style:font-pitch="variable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autorizaTFG" style:page-layout-name="Mpm2" draw:style-name="Mdp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001000003530000058AB89F4DDB.png" xlink:type="simple" xlink:show="embed" xlink:actuate="onLoad" draw:mime-type="image/png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1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001000004450000058946CD617E.png" xlink:type="simple" xlink:show="embed" xlink:actuate="onLoad" draw:mime-type="image/png"/></draw:frame></text:p>
            </table:table-cell>
          </table:table-row>
        </table:table>
        <text:p text:style-name="Standard"/>
      </style:header>
    </style:master-page>
    <style:master-page style:name="blanca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 P.A.</meta:initial-creator>
    <meta:creation-date>2015-05-30T11:29:35</meta:creation-date>
    <meta:generator>LibreOffice/26.2.1.2$Windows_X86_64 LibreOffice_project/620$Build-2</meta:generator>
    <dc:date>2026-05-05T22:25:29.241388100</dc:date>
    <meta:editing-duration>PT23M54S</meta:editing-duration>
    <meta:editing-cycles>10</meta:editing-cycles>
    <dc:title>&lt;título del TFG (plantilla)&gt;</dc:title>
    <dc:subject>Trabajo final del GºIng.Informática</dc:subject>
    <meta:document-statistic meta:table-count="1" meta:image-count="2" meta:object-count="0" meta:page-count="2" meta:paragraph-count="11" meta:word-count="83" meta:character-count="525" meta:non-whitespace-character-count="448"/>
    <meta:user-defined meta:name="FechaEntrega">&lt;junio de 2016&gt;</meta:user-defined>
    <meta:user-defined meta:name="Tutor">&lt;nombre_tutor&gt;</meta:user-defined>
  </office:meta>
</office:document-meta>
</file>