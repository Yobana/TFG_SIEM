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4cm" fo:margin-bottom="0.199cm" style:contextual-spacing="false" style:page-number="auto" fo:break-before="auto" fo:break-after="auto"/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top="0.4cm" fo:margin-bottom="0.199cm" style:contextual-spacing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4pt" fo:font-weight="bold" style:font-style-asian="normal" style:font-weight-asian="bold" style:font-size-complex="14pt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</text:p>
      <text:p text:style-name="UBUcuerpoTrabajo">{En este primer apartado se hace una <text:span text:style-name="T1">breve</text:span> presentación del tema que se aborda en el proyecto.}<text:note text:id="ftn1" text:note-class="footnote"><text:note-citation>1</text:note-citation><text:note-body><text:p text:style-name="Footnote">Estilo de párrafo «UBUcuerpoTrabajo» justificado, separación silábica (&gt;=3 caracteres); sangría 1ª línea 0'5cm; espacio después del párrafo 0'2cm; fuente serif 12 puntos</text:p></text:note-body></text:note></text:p>
      <text:p text:style-name="P2"><text:span text:style-name="inglés"><text:span text:style-name="T2">Abstract</text:span></text:span></text:p>
      <text:p text:style-name="Abstract"><text:span text:style-name="inglés">{A </text:span><text:span text:style-name="inglés"><text:span text:style-name="T1">brief</text:span></text:span><text:span text:style-name="inglés"> presentation of the topic addressed in the project.}</text:span><text:span text:style-name="inglés"><text:note text:id="ftn2" text:note-class="footnote"><text:note-citation>2</text:note-citation><text:note-body><text:p text:style-name="Footnote">Estilo de párrafo «Abstract» Cursiva + diccionario inglés + todo el estilo «UBUcuerpoTrabajo»<text:line-break/>Estilo de carácter «inglés» Cursiva + diccionario inglés</text:p></text:note-body></text:note></text:span></text:p>
      <text:h text:style-name="P3" text:outline-level="1"><text:span text:style-name="inglés">Introducción</text:span><text:span text:style-name="inglés"><text:note text:id="ftn3" text:note-class="footnote"><text:note-citation>3</text:note-citation><text:note-body><text:p text:style-name="Footnote">Estilo de párrafo «Encabezado 1» numerado en romano, alineado a la izquierda, sangría 0'75, 1º línea -0'25; espacio antes del párrafo 0'8, después del párrafo 0'2cm; fuente sans serif 16 puntos negrita y versalitas (no escribáis en mayúsculas el estilo se encarga de ello)</text:p></text:note-body></text:note></text:span></text:h>
      <text:p text:style-name="UBUcuerpoTrabajo"><text:span text:style-name="inglés"><text:span text:style-name="T3"/></text:span></text:p>
      <text:p text:style-name="UBUcuerpoTrabajo"><text:span text:style-name="inglés"><text:span text:style-name="T3">El presente Trabajo de Fin de Grado tiene como objetivo el diseño e implementación de un sistema SIEM (Security Information and Event Management) aplicado a un entorno simulado de alta seguridad, concretamente un polvorín militar.</text:span></text:span></text:p>
      <text:p text:style-name="UBUcuerpoTrabajo"><text:span text:style-name="inglés"><text:span text:style-name="T3"/></text:span></text:p>
      <text:p text:style-name="UBUcuerpoTrabajo"><text:span text:style-name="inglés"><text:span text:style-name="T3">En la actualidad, la protección de infraestructuras críticas es un aspecto fundamental dentro del ámbito de la ciberseguridad y la seguridad física. Instalaciones como polvorines, centros logísticos o infraestructuras energéticas requieren sistemas avanzados capaces de monitorizar eventos en tiempo real, detectar anomalías y generar alertas ante posibles incidentes de seguridad.</text:span></text:span></text:p>
      <text:p text:style-name="UBUcuerpoTrabajo"><text:span text:style-name="inglés"><text:span text:style-name="T3"/></text:span></text:p>
      <text:p text:style-name="UBUcuerpoTrabajo"><text:span text:style-name="inglés"><text:span text:style-name="T3">En este contexto, los sistemas SIEM permiten centralizar la recogida de eventos procedentes de múltiples fuentes, procesarlos y aplicar reglas de correlación para identificar situaciones de riesgo que no serían detectables mediante el análisis aislado de eventos individuales.</text:span></text:span></text:p>
      <text:p text:style-name="UBUcuerpoTrabajo"><text:span text:style-name="inglés"><text:span text:style-name="T3"/></text:span></text:p>
      <text:p text:style-name="UBUcuerpoTrabajo"><text:span text:style-name="inglés"><text:span text:style-name="T3">El proyecto desarrollado simula un entorno realista de un polvorín, incorporando diferentes elementos de seguridad como sistemas de control de acceso mediante tarjeta, sensores de movimiento, sensores ambientales (temperatura y humedad), sensores magnéticos de apertura de puertas y sistemas de control eléctrico con respaldo mediante grupo electrógeno.</text:span></text:span></text:p>
      <text:p text:style-name="UBUcuerpoTrabajo"><text:span text:style-name="inglés"><text:span text:style-name="T3"/></text:span></text:p>
      <text:p text:style-name="UBUcuerpoTrabajo"><text:span text:style-name="inglés"><text:span text:style-name="T3">A partir de estos elementos, se generan logs estructurados que son procesados por el sistema SIEM desarrollado, permitiendo la ingesta de eventos, su almacenamiento y la futura aplicación de reglas de correlación para la detección de incidentes de seguridad.</text:span></text:span></text:p>
      <text:p text:style-name="UBUcuerpoTrabajo"><text:span text:style-name="inglés"><text:span text:style-name="T3"/></text:span></text:p>
      <text:p text:style-name="UBUcuerpoTrabajo"><text:span text:style-name="inglés"><text:span text:style-name="T3">La memoria se estructura en varios apartados. En primer lugar, se presentan los objetivos del proyecto. Posteriormente, se describen los conceptos teóricos necesarios para comprender el funcionamiento de los sistemas SIEM. A continuación, se detallan las técnicas y herramientas utilizadas, así como los aspectos más relevantes del desarrollo del sistema. Finalmente, se incluyen las conclusiones obtenidas y posibles líneas de trabajo futur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UBUcuerpoTrabajo" style:family="paragraph" style:parent-style-name="Text_20_body">
      <style:paragraph-properties fo:margin-left="0cm" fo:margin-right="0cm" fo:margin-top="0cm" fo:margin-bottom="0cm" style:contextual-spacing="false" fo:text-indent="0.499cm" style:auto-text-indent="false"/>
      <style:text-properties style:font-size-asian="10.5pt"/>
    </style:style>
    <style:style style:name="Heading_20_1" style:display-name="Heading 1" style:family="paragraph" style:parent-style-name="Heading" style:next-style-name="UBUcuerpoTrabajo" style:default-outline-level="1" style:class="chapter" style:master-page-name="">
      <style:paragraph-properties fo:margin-top="0.42cm" fo:margin-bottom="0.21cm" style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tract" style:family="paragraph" style:parent-style-name="UBUcuerpoTrabajo">
      <style:text-properties fo:language="en" fo:country="US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ne_20_numbering" style:display-name="Line numbering" style:family="text"/>
    <style:style style:name="inglés" style:family="text">
      <style:text-properties fo:language="en" fo:country="US" fo:font-style="italic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  <number:date-style style:name="N111">
      <number:day number:style="long"/>
      <number:text>/</number:text>
      <number:month number:textual="true"/>
      <number:text>/</number:text>
      <number:year/>
    </number:date-style>
    <number:date-style style:name="N10111" number:language="es" number:country="ES">
      <number:day number:style="long"/>
      <number:text>/</number:text>
      <number:month number:textual="true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file-name text:display="name-and-extension">1_Introduccion.odt</text:file-name><text:s/>v.<text:editing-cycles>45</text:editing-cycles> <text:modification-date style:data-style-name="N111">05/may/26</text:modification-date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pa </meta:initial-creator>
    <meta:creation-date>2014-01-25T22:09:02</meta:creation-date>
    <meta:generator>LibreOffice/26.2.1.2$Windows_X86_64 LibreOffice_project/620$Build-2</meta:generator>
    <dc:date>2026-05-05T22:20:36.269708200</dc:date>
    <meta:editing-duration>PT2H6M54S</meta:editing-duration>
    <meta:editing-cycles>45</meta:editing-cycles>
    <meta:document-statistic meta:table-count="0" meta:image-count="0" meta:object-count="0" meta:page-count="2" meta:paragraph-count="15" meta:word-count="392" meta:character-count="2756" meta:non-whitespace-character-count="2378"/>
  </office:meta>
</office:document-meta>
</file>