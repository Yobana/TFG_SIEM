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Heading_20_1" style:master-page-name="">
      <style:paragraph-properties style:page-number="auto" fo:break-before="auto" fo:break-after="auto"/>
    </style:style>
    <style:style style:name="P2" style:family="paragraph" style:parent-style-name="UBUcuerpoTrabajo">
      <style:paragraph-properties fo:margin-lef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bjetivos del proyecto </text:h>
      <text:p text:style-name="P2"/>
      <text:p text:style-name="UBUcuerpoTrabajo">El objetivo principal de este Trabajo de Fin de Grado es el diseño e implementación de un sistema SIEM (Security Information and Event Management) capaz de procesar eventos de seguridad en un entorno simulado de alta criticidad, concretamente un polvorín.</text:p>
      <text:p text:style-name="UBUcuerpoTrabajo"/>
      <text:p text:style-name="UBUcuerpoTrabajo">Para alcanzar este objetivo principal, se plantean los siguientes objetivos específicos:</text:p>
      <text:p text:style-name="UBUcuerpoTrabajo"/>
      <text:p text:style-name="UBUcuerpoTrabajo">- Diseñar una arquitectura modular que permita la ingesta, procesamiento y almacenamiento de eventos de seguridad.</text:p>
      <text:p text:style-name="UBUcuerpoTrabajo"/>
      <text:p text:style-name="UBUcuerpoTrabajo">- Implementar un sistema de ingesta de logs capaz de leer y normalizar eventos procedentes de diferentes fuentes simuladas.</text:p>
      <text:p text:style-name="UBUcuerpoTrabajo"/>
      <text:p text:style-name="UBUcuerpoTrabajo">- Definir una estructura de eventos completa que permita representar información relevante como el origen del evento, tipo, nivel de severidad, usuario, dispositivo y resultado.</text:p>
      <text:p text:style-name="UBUcuerpoTrabajo"/>
      <text:p text:style-name="UBUcuerpoTrabajo">- Simular un entorno realista mediante la generación de logs que representen eventos de control de acceso, sensores de seguridad y condiciones ambientales.</text:p>
      <text:p text:style-name="UBUcuerpoTrabajo"/>
      <text:p text:style-name="UBUcuerpoTrabajo">- Desarrollar un motor básico de correlación de eventos que permita detectar situaciones anómalas a partir del análisis conjunto de múltiples eventos.</text:p>
      <text:p text:style-name="UBUcuerpoTrabajo"/>
      <text:p text:style-name="UBUcuerpoTrabajo">- Evaluar el funcionamiento del sistema mediante la generación de diferentes escenarios de prueba.</text:p>
      <text:p text:style-name="UBUcuerpoTrabajo"/>
      <text:p text:style-name="UBUcuerpoTrabajo">Además, como objetivo técnico, se pretende aplicar conocimientos adquiridos durante el grado en áreas como programación, arquitectura de sistemas y seguridad informática, desarrollando una solución estructurada y escalabl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UBUcuerpoTrabajo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eading_20_1" style:display-name="Heading 1" style:family="paragraph" style:parent-style-name="Heading" style:next-style-name="UBUcuerpoTrabajo" style:default-outline-level="1" style:class="chapter" style:master-page-name="">
      <style:paragraph-properties fo:margin-top="0.42cm" fo:margin-bottom="0.21cm" style:contextual-spacing="false" style:page-number="auto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list-style-name="List_20_1" style:class="list">
      <style:paragraph-properties fo:margin-top="0cm" fo:margin-bottom="0.212cm" style:contextual-spacing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top="0cm" fo:margin-bottom="0.212cm" style:contextual-spacing="false" fo:text-indent="-0.635cm" style:auto-text-indent="fals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1">
      <number:day number:style="long"/>
      <number:text>/</number:text>
      <number:month number:textual="true"/>
      <number:text>/</number:text>
      <number:year/>
    </number:date-style>
    <number:date-style style:name="N10111" number:language="es" number:country="ES">
      <number:day number:style="long"/>
      <number:text>/</number:text>
      <number:month number:textual="true"/>
      <number:text>/</number:text>
      <number:year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file-name text:display="name-and-extension">2_ObjetivosDelProyecto.odt</text:file-name><text:s/>v.<text:editing-cycles>13</text:editing-cycles> <text:title/><text:modification-date style:data-style-name="N111">05/may/26</text:modification-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pa </meta:initial-creator>
    <meta:creation-date>2014-01-25T22:23:01</meta:creation-date>
    <meta:generator>LibreOffice/26.2.1.2$Windows_X86_64 LibreOffice_project/620$Build-2</meta:generator>
    <dc:date>2026-05-05T22:21:04.313956100</dc:date>
    <meta:editing-duration>PT11M43S</meta:editing-duration>
    <meta:editing-cycles>13</meta:editing-cycles>
    <meta:document-statistic meta:table-count="0" meta:image-count="0" meta:object-count="0" meta:page-count="1" meta:paragraph-count="11" meta:word-count="205" meta:character-count="1452" meta:non-whitespace-character-count="1256"/>
  </office:meta>
</office:document-meta>
</file>