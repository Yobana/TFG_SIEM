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automatic-styles>
    <style:style style:name="P1" style:family="paragraph" style:parent-style-name="Heading_20_1" style:master-page-name="">
      <style:paragraph-properties style:page-number="auto" fo:break-before="auto" fo:break-after="auto"/>
    </style:style>
    <style:style style:name="P2" style:family="paragraph" style:parent-style-name="UBUcuerpoTrabajo">
      <style:paragraph-properties fo:margin-left="0cm" fo:text-indent="0cm" style:auto-text-indent="false"/>
    </style:style>
    <style:style style:name="P3" style:family="paragraph" style:parent-style-name="Text_20_body">
      <style:text-properties officeooo:rsid="001c908e" officeooo:paragraph-rsid="001c908e"/>
    </style:style>
    <style:style style:name="P4" style:family="paragraph" style:parent-style-name="Heading_20_2">
      <style:text-properties officeooo:paragraph-rsid="001c908e"/>
    </style:style>
    <style:style style:name="P5" style:family="paragraph" style:parent-style-name="Heading_20_2">
      <style:text-properties officeooo:rsid="001c908e" officeooo:paragraph-rsid="001c908e"/>
    </style:style>
    <style:style style:name="P6" style:family="paragraph" style:parent-style-name="Text_20_body">
      <style:text-properties officeooo:paragraph-rsid="001c908e"/>
    </style:style>
    <style:style style:name="T1" style:family="text">
      <style:text-properties style:font-name="Liberation Sans" fo:font-size="14pt" fo:font-style="normal" fo:font-weight="bold" officeooo:rsid="001c908e" style:font-size-asian="14pt" style:font-style-asian="normal" style:font-weight-asian="bold" style:font-size-complex="14pt" style:font-style-complex="normal" style:font-weight-complex="bold"/>
    </style:style>
    <style:style style:name="T2" style:family="text">
      <style:text-properties officeooo:rsid="001c90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nceptos teóricos</text:h>
      <text:h text:style-name="Heading_20_2" text:outline-level="2"><text:span text:style-name="T1">3.1 Sistemas SIEM</text:span><text:span text:style-name="T1"><text:note text:id="ftn1" text:note-class="footnote"><text:note-citation>1</text:note-citation><text:note-body><text:p text:style-name="Footnote">Estilo de párrafo «Encabezado 2» numerado esquema, alineado a la izquierda, sangría 0'75, 1º línea -0'25; espacio antes del párrafo 0'6, después del párrafo 0'2cm; fuente sans serif 15 negrita<text:line-break/>Estilo de párrafo «Encabezado 3» (y siguientes) numerado esquema, alineado a la izquierda, sangría 0'75, 1º línea <text:s/>-0'25; espacio antes del párrafo 0'42, después del párrafo 0'2cm; fuente sans serif 14 negrita</text:p></text:note-body></text:note></text:span></text:h>
      <text:p text:style-name="P2">Los sistemas SIEM (Security Information and Event Management) son herramientas diseñadas para recopilar, analizar y correlacionar eventos de seguridad procedentes de múltiples fuentes dentro de una infraestructura.</text:p>
      <text:p text:style-name="UBUcuerpoTrabajo"/>
      <text:p text:style-name="P2">Su principal objetivo es proporcionar una visión centralizada de la seguridad del sistema, permitiendo detectar incidentes que no serían evidentes al analizar eventos de forma aislada.</text:p>
      <text:p text:style-name="UBUcuerpoTrabajo"/>
      <text:p text:style-name="P2">Un SIEM combina dos funcionalidades principales: la gestión de eventos de seguridad (SEM) y la gestión de información de seguridad (SIM), integrando la monitorización en tiempo real con el almacenamiento y análisis histórico de datos.</text:p>
      <text:h text:style-name="Heading_20_2" text:outline-level="2"><text:span text:style-name="T2">3.2 Eventos de seguridad</text:span><text:span text:style-name="T2"><text:note text:id="ftn2" text:note-class="footnote"><text:note-citation>2</text:note-citation><text:note-body><text:p text:style-name="Footnote">Ejemplo de contenido (bórrese)</text:p></text:note-body></text:note></text:span></text:h>
      <text:p text:style-name="P3">Un evento de seguridad es cualquier acción o suceso relevante que ocurre dentro de un sistema y que puede tener implicaciones en su seguridad.</text:p>
      <text:p text:style-name="P3"/>
      <text:p text:style-name="P3">Los eventos pueden proceder de diferentes fuentes, como sistemas de control de acceso, sensores, dispositivos de red o aplicaciones.</text:p>
      <text:p text:style-name="P3"/>
      <text:p text:style-name="P3">Para su correcto análisis, los eventos deben estructurarse adecuadamente, incluyendo información como la fecha y hora, el origen, el tipo de evento, el nivel de severidad y otros datos relevantes que permitan su interpretación.</text:p>
      <text:p text:style-name="UBUcuerpoTrabajo"/>
      <text:h text:style-name="Heading_20_2" text:outline-level="2"><text:span text:style-name="T2">3.3 </text:span>Co<text:span text:style-name="T2">rrelación de eventos</text:span></text:h>
      <text:p text:style-name="Text_20_body">La correlación de eventos es el proceso mediante el cual se analizan múltiples eventos de forma conjunta con el objetivo de detectar patrones o situaciones que puedan indicar un incidente de seguridad.</text:p>
      <text:p text:style-name="Text_20_body"/>
      <text:p text:style-name="Text_20_body">A diferencia del análisis individual de eventos, la correlación permite identificar relaciones entre distintos sucesos, como por ejemplo la detección de movimiento en una zona sin que exista un acceso previo autorizado.</text:p>
      <text:p text:style-name="Text_20_body"/>
      <text:p text:style-name="Text_20_body">Este tipo de análisis es fundamental en sistemas SIEM, ya que permite generar alertas más precisas y reducir el número de falsos positivos.</text:p>
      <text:p text:style-name="Text_20_body"/>
      <text:h text:style-name="P4" text:outline-level="2"><text:soft-page-break/></text:h>
      <text:h text:style-name="P5" text:outline-level="2">3.4 Monitorización de infraestructuras críticas</text:h>
      <text:p text:style-name="P6">La monitorización de infraestructuras críticas consiste en supervisar de forma continua los diferentes sistemas y dispositivos que forman parte de una instalación, con el objetivo de garantizar su correcto funcionamiento y detectar posibles incidencias.</text:p>
      <text:p text:style-name="P6"/>
      <text:p text:style-name="P6">En entornos como polvorines o instalaciones de alta seguridad, esta monitorización incluye tanto aspectos físicos, como accesos o sensores ambientales, como aspectos técnicos, como el estado de los sistemas eléctricos o de comunicaciones.</text:p>
      <text:p text:style-name="P6"/>
      <text:p text:style-name="P6">La integración de todos estos elementos en un sistema centralizado permite mejorar la capacidad de respuesta ante incidentes y aumentar el nivel de seguridad global.</text:p>
      <text:p text:style-name="UBUcuerpoTrabajo"/>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Droid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UBUcuerpoTrabajo" style:default-outline-level="1" style:class="chapter">
      <style:paragraph-properties fo:margin-top="0.42cm" fo:margin-bottom="0.21cm" style:contextual-spacing="false"/>
      <style:text-properties fo:font-size="115%" fo:font-weight="bold" style:font-size-asian="115%" style:font-weight-asian="bold" style:font-size-complex="115%" style:font-weight-complex="bold"/>
    </style:style>
    <style:style style:name="UBUcuerpoTrabajo" style:family="paragraph" style:parent-style-name="Text_20_body" style:class="text">
      <style:paragraph-properties fo:margin-left="0cm" fo:margin-right="0cm" fo:margin-top="0cm" fo:margin-bottom="0cm" style:contextual-spacing="false"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0" style:display-name="Heading 10" style:family="paragraph" style:parent-style-name="Heading" style:next-style-name="Text_20_body" style:default-outline-level="10" style:class="chapter" style:master-page-name="">
      <style:paragraph-properties style:page-number="auto"/>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day number:style="long"/>
      <number:text>/</number:text>
      <number:month number:textual="true"/>
      <number:text>/</number:text>
      <number:year/>
    </number:date-style>
    <number:date-style style:name="N10111" number:language="es" number:country="ES">
      <number:day number:style="long"/>
      <number:text>/</number:text>
      <number:month number:textual="true"/>
      <number:text>/</number:text>
      <number:year/>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file-name text:display="name-and-extension">3_ConceptosTeoricos.odt</text:file-name><text:s/>v.<text:editing-cycles>17</text:editing-cycles> <text:title/><text:modification-date style:data-style-name="N111">05/may/26</text:modification-date><text:tab/><text:tab/><text:page-number text:select-page="current">1</text:page-number>/<text:page-count>2</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cpa </meta:initial-creator>
    <meta:creation-date>2014-01-25T22:22:16</meta:creation-date>
    <meta:generator>LibreOffice/26.2.1.2$Windows_X86_64 LibreOffice_project/620$Build-2</meta:generator>
    <dc:date>2026-05-05T22:20:53.012532000</dc:date>
    <meta:editing-duration>PT20M41S</meta:editing-duration>
    <meta:editing-cycles>17</meta:editing-cycles>
    <meta:printed-by>Carlos Pardo Aguilar</meta:printed-by>
    <meta:print-date>2015-07-18T14:21:34</meta:print-date>
    <meta:document-statistic meta:table-count="0" meta:image-count="0" meta:object-count="0" meta:page-count="2" meta:paragraph-count="20" meta:word-count="432" meta:character-count="2957" meta:non-whitespace-character-count="2543"/>
  </office:meta>
</office:document-meta>
</file>