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Heading_20_2">
      <style:text-properties officeooo:rsid="000bba50"/>
    </style:style>
    <style:style style:name="P2" style:family="paragraph" style:parent-style-name="Heading_20_2">
      <style:text-properties officeooo:rsid="000bba50" officeooo:paragraph-rsid="000bba50"/>
    </style:style>
    <style:style style:name="P3" style:family="paragraph" style:parent-style-name="Text_20_body">
      <style:text-properties officeooo:paragraph-rsid="000bba50"/>
    </style:style>
    <style:style style:name="P4" style:family="paragraph" style:parent-style-name="Heading_20_2">
      <style:text-properties officeooo:paragraph-rsid="000bba50"/>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text-properties fo:color="#c0c0c0" loext:opacity="100%" style:text-outline="false" style:text-line-through-style="none" style:text-line-through-type="none" fo:font-family="'Embossing Tape 3 BRK'" style:font-pitch="variable" fo:font-size="28pt" fo:font-style="normal" fo:text-shadow="none" style:text-underline-style="none" fo:font-weight="normal" style:letter-kerning="true" style:font-name-asian="Droid Sans" style:font-size-asian="28pt" style:font-style-asian="normal" style:font-weight-asian="normal" style:font-name-complex="Lohit Hindi1" style:font-size-complex="28pt" style:font-style-complex="normal" style:font-weight-complex="normal" style:text-emphasize="none" style:font-relief="none" style:text-overline-style="none" style:text-overline-color="font-color"/>
    </style:style>
    <style:style style:name="T1" style:family="text">
      <style:text-properties officeooo:rsid="000bba50"/>
    </style:style>
    <style:style style:name="T2" style:family="text">
      <style:text-properties fo:color="#c0c0c0" loext:opacity="100%" style:text-outline="false" style:text-line-through-style="none" style:text-line-through-type="none" fo:font-family="'Embossing Tape 3 BRK'" style:font-pitch="variable" fo:font-size="32pt" fo:font-style="normal" fo:text-shadow="none" style:text-underline-style="none" fo:font-weight="normal" style:letter-kerning="true" style:font-name-asian="Droid Sans" style:font-size-asian="32pt" style:font-style-asian="normal" style:font-weight-asian="normal" style:font-name-complex="Lohit Hindi1" style:font-size-complex="32pt" style:font-style-complex="normal" style:font-weight-complex="normal" style:text-emphasize="none" style:font-relief="none" style:text-overline-style="none" style:text-overline-color="font-color"/>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écnicas y herramientas</text:h>
      <text:p text:style-name="UBUcuerpoTrabajo"/>
      <text:h text:style-name="P1" text:outline-level="2">4.1 Lenguaje de programación </text:h>
      <text:p text:style-name="Text_20_body">Para el desarrollo del sistema se ha utilizado el lenguaje de programación Python, debido a su simplicidad, versatilidad y amplia disponibilidad de librerías orientadas al tratamiento de datos y desarrollo de aplicaciones.</text:p>
      <text:p text:style-name="Text_20_body"/>
      <text:p text:style-name="Text_20_body">Python permite implementar de forma sencilla sistemas modulares, facilitando la separación de responsabilidades entre los distintos componentes del SIEM, como el módulo de ingesta, el motor de correlación y la gestión de datos.</text:p>
      <text:h text:style-name="P2" text:outline-level="2">4.2 Control de versiones </text:h>
      <text:p text:style-name="P3">Para la gestión del código fuente se ha utilizado Git junto con la plataforma GitHub, lo que ha permitido llevar un control de versiones del proyecto, así como organizar el desarrollo mediante ramas, issues y commits.</text:p>
      <text:p text:style-name="P3"/>
      <text:p text:style-name="P3">El uso de estas herramientas facilita el seguimiento del progreso del proyecto y permite mantener un historial de cambios estructurado.</text:p>
      <text:h text:style-name="P2" text:outline-level="2">4.3 Arquitectura del sistema</text:h>
      <text:p text:style-name="P3">El sistema se ha diseñado siguiendo una arquitectura modular, en la que cada componente tiene una responsabilidad específica.</text:p>
      <text:p text:style-name="P3"/>
      <text:p text:style-name="P3">Los principales módulos del sistema son:</text:p>
      <text:p text:style-name="P3"/>
      <text:p text:style-name="P3">- Módulo de ingesta de logs, encargado de leer y normalizar los eventos.</text:p>
      <text:p text:style-name="P3">- Motor de correlación, responsable de analizar los eventos y detectar posibles incidentes.</text:p>
      <text:p text:style-name="P3">- Módulo de almacenamiento, que permite guardar los eventos y las alertas generadas.</text:p>
      <text:p text:style-name="P3">- API, que permite la interacción con el sistema.</text:p>
      <text:p text:style-name="P3"/>
      <text:p text:style-name="P3">Este enfoque modular facilita la escalabilidad y el mantenimiento del sistema.</text:p>
      <text:p text:style-name="P3"/>
      <text:p text:style-name="P3"/>
      <text:p text:style-name="P3"/>
      <text:p text:style-name="P3"/>
      <text:p text:style-name="P3"/>
      <text:p text:style-name="P3"/>
      <text:h text:style-name="P4" text:outline-level="2"><text:soft-page-break/><text:span text:style-name="T1">4.4 Simulación de eventos</text:span></text:h>
      <text:p text:style-name="P3">Para simular un entorno realista, se han generado logs que representan eventos de seguridad en un polvorín, incluyendo accesos mediante tarjeta, eventos de sensores y estados del sistema.</text:p>
      <text:p text:style-name="P3"/>
      <text:p text:style-name="P3">Estos eventos se estructuran siguiendo un formato definido que permite su procesamiento por el sistema SIEM y la posterior aplicación de reglas de correlación.</text:p>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UBUcuerpoTrabajo"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UBUcuerpoTrabajo" style:default-outline-level="1" style:class="chapter">
      <style:paragraph-properties fo:margin-top="0.42cm" fo:margin-bottom="0.21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style="long"/>
      <number:text>/</number:text>
      <number:month number:textual="true"/>
      <number:text>/</number:text>
      <number:year/>
    </number:date-style>
    <number:date-style style:name="N10111" number:language="es" number:country="ES">
      <number:day number:style="long"/>
      <number:text>/</number:text>
      <number:month number:textual="true"/>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loext:opacity="100%" style:text-outline="false" style:text-line-through-style="none" style:text-line-through-type="none" fo:font-family="'Embossing Tape 3 BRK'" style:font-pitch="variable" fo:font-size="28pt" fo:font-style="normal" fo:text-shadow="none" style:text-underline-style="none" fo:font-weight="normal" style:letter-kerning="true" style:font-name-asian="Droid Sans" style:font-size-asian="28pt" style:font-style-asian="normal" style:font-weight-asian="normal" style:font-name-complex="Lohit Hindi1" style:font-size-complex="28pt" style:font-style-complex="normal" style:font-weight-complex="normal" style:text-emphasize="none" style:font-relief="none" style:text-overline-style="none" style:text-overline-color="font-color"/>
    </style:style>
    <style:style style:name="MT1" style:family="text">
      <style:text-properties fo:color="#c0c0c0" loext:opacity="100%" style:text-outline="false" style:text-line-through-style="none" style:text-line-through-type="none" fo:font-family="'Embossing Tape 3 BRK'" style:font-pitch="variable" fo:font-size="32pt" fo:font-style="normal" fo:text-shadow="none" style:text-underline-style="none" fo:font-weight="normal" style:letter-kerning="true" style:font-name-asian="Droid Sans" style:font-size-asian="32pt" style:font-style-asian="normal" style:font-weight-asian="normal" style:font-name-complex="Lohit Hindi1"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text:anchor-type="paragraph" draw:z-index="1" draw:name="Forma1"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4_TecnicasHerramientas.odt</text:file-name><text:s/>v.<text:editing-cycles>13</text:editing-cycles> <text:title/><text:modification-date style:data-style-name="N111">05/may/26</text:modification-date><text:tab/><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pa </meta:initial-creator>
    <meta:creation-date>2014-01-25T22:20:26</meta:creation-date>
    <meta:generator>LibreOffice/26.2.1.2$Windows_X86_64 LibreOffice_project/620$Build-2</meta:generator>
    <dc:date>2026-05-05T22:21:26.434623100</dc:date>
    <meta:editing-duration>PT17M41S</meta:editing-duration>
    <meta:editing-cycles>13</meta:editing-cycles>
    <meta:document-statistic meta:table-count="0" meta:image-count="0" meta:object-count="0" meta:page-count="2" meta:paragraph-count="19" meta:word-count="279" meta:character-count="1862" meta:non-whitespace-character-count="1599"/>
  </office:meta>
</office:document-meta>
</file>