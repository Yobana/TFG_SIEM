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bba50"/>
    </style:style>
    <style:style style:name="P2" style:family="paragraph" style:parent-style-name="Heading_20_2">
      <style:text-properties officeooo:rsid="000bba50" officeooo:paragraph-rsid="000bba50"/>
    </style:style>
    <style:style style:name="P3" style:family="paragraph" style:parent-style-name="Text_20_body">
      <style:text-properties officeooo:paragraph-rsid="000bba50"/>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text-properties officeooo:paragraph-rsid="000e7e84"/>
    </style:style>
    <style:style style:name="P7" style:family="paragraph" style:parent-style-name="Heading_20_2">
      <style:text-properties officeooo:paragraph-rsid="000bba50"/>
    </style:style>
    <style:style style:name="T1" style:family="text">
      <style:text-properties officeooo:rsid="000e7e84"/>
    </style:style>
    <style:style style:name="T2" style:family="text">
      <style:text-properties officeooo:rsid="000bba5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écnicas y herramientas</text:h>
      <text:p text:style-name="UBUcuerpoTrabajo"/>
      <text:h text:style-name="P1" text:outline-level="2">4.1 Lenguaje de programación </text:h>
      <text:p text:style-name="Text_20_body">Para el desarrollo del sistema se ha utilizado el lenguaje de programación Python, debido a su simplicidad, versatilidad y amplia disponibilidad de librerías orientadas al tratamiento de datos y desarrollo de aplicaciones.</text:p>
      <text:p text:style-name="Text_20_body"/>
      <text:p text:style-name="Text_20_body">Python permite implementar de forma sencilla sistemas modulares, facilitando la separación de responsabilidades entre los distintos componentes del SIEM, como el módulo de ingesta, el motor de correlación y la gestión de datos.</text:p>
      <text:h text:style-name="P2" text:outline-level="2">4.2 Control de versiones </text:h>
      <text:p text:style-name="P3">Para la gestión del código fuente se ha utilizado Git junto con la plataforma GitHub, lo que ha permitido llevar un control de versiones del proyecto, así como organizar el desarrollo mediante ramas, issues y commits.</text:p>
      <text:p text:style-name="P3"/>
      <text:p text:style-name="P3">El uso de estas herramientas facilita el seguimiento del progreso del proyecto y permite mantener un historial de cambios estructurado.</text:p>
      <text:h text:style-name="P2" text:outline-level="2">4.3 Arquitectura del sistema</text:h>
      <text:p text:style-name="P3">El sistema se ha diseñado siguiendo una arquitectura modular, en la que cada componente tiene una responsabilidad específica.</text:p>
      <text:p text:style-name="P3"/>
      <text:p text:style-name="P3">Los principales módulos del sistema son:</text:p>
      <text:p text:style-name="P3"/>
      <text:p text:style-name="P3">- Módulo de ingesta de logs, encargado de leer y normalizar los eventos.</text:p>
      <text:p text:style-name="P3">- Motor de correlación, responsable de analizar los eventos y detectar posibles incidentes.</text:p>
      <text:p text:style-name="P3">- Módulo de almacenamiento, que permite guardar los eventos y las alertas generadas.</text:p>
      <text:p text:style-name="P3">- API, que permite la interacción con el sistema.</text:p>
      <text:p text:style-name="P3"/>
      <text:p text:style-name="P3">Este enfoque modular facilita la escalabilidad y el mantenimiento del sistema.</text:p>
      <text:p text:style-name="P3">Además de los módulos software, el entorno simulado incorpora distintos dispositivos de seguridad física que generan eventos monitorizados por el SIEM.</text:p>
      <text:p text:style-name="Text_20_body">Entre los dispositivos representados se encuentran:</text:p>
      <text:list text:style-name="L1">
        <text:list-item>
          <text:p text:style-name="P4">Sistema de control de acceso mediante lector de tarjetas RFID. </text:p>
        </text:list-item>
        <text:list-item>
          <text:p text:style-name="P4">Cámaras IP de vigilancia perimetral. </text:p>
        </text:list-item>
        <text:list-item>
          <text:p text:style-name="P4">Sensores magnéticos de apertura de puertas. </text:p>
        </text:list-item>
        <text:list-item>
          <text:p text:style-name="P4">Sensores volumétricos de movimiento. </text:p>
        </text:list-item>
        <text:list-item>
          <text:p text:style-name="P5">Sensores ambientales de temperatura y humedad. </text:p>
        </text:list-item>
      </text:list>
      <text:p text:style-name="Text_20_body">Estos dispositivos permiten simular un entorno de alta seguridad similar al de un polvorín militar, generando eventos que posteriormente son procesados por el sistema.</text:p>
      <text:p text:style-name="Text_20_body"><text:soft-page-break/></text:p>
      <text:p text:style-name="Text_20_body">Las imágenes utilizadas son representativas y corresponden a un entorno simulado con finalidad académica, evitando incluir información sensible o elementos reales de instalaciones militares.</text:p>
      <text:p text:style-name="P3"/>
      <text:p text:style-name="P6">Foto del torno/lector RFID</text:p>
      <text:p text:style-name="P6">Foto de cámara perimetral</text:p>
      <text:p text:style-name="P6"><text:span text:style-name="T1">Demás </text:span>sensores si quieres </text:p>
      <text:p text:style-name="P3"/>
      <text:p text:style-name="P3"/>
      <text:p text:style-name="P3"/>
      <text:h text:style-name="P7" text:outline-level="2"><text:span text:style-name="T2">4.4 Simulación de eventos</text:span></text:h>
      <text:p text:style-name="P3">Para simular un entorno realista, se han generado logs que representan eventos de seguridad en un polvorín, incluyendo accesos mediante tarjeta, eventos de sensores y estados del sistema.</text:p>
      <text:p text:style-name="P3"/>
      <text:p text:style-name="P3">Estos eventos se estructuran siguiendo un formato definido que permite su procesamiento por el sistema SIEM y la posterior aplicación de reglas de correlación.</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file-name text:display="name-and-extension">4_TecnicasHerramientas.odt</text:file-name><text:s/>v.<text:editing-cycles>15</text:editing-cycles> <text:title/><text:modification-date style:data-style-name="N111">07/may/26</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20:26</meta:creation-date>
    <meta:generator>LibreOffice/26.2.1.2$Windows_X86_64 LibreOffice_project/620$Build-2</meta:generator>
    <dc:date>2026-05-07T22:33:40.617634700</dc:date>
    <meta:editing-duration>PT22M45S</meta:editing-duration>
    <meta:editing-cycles>15</meta:editing-cycles>
    <meta:document-statistic meta:table-count="0" meta:image-count="0" meta:object-count="0" meta:page-count="2" meta:paragraph-count="31" meta:word-count="402" meta:character-count="2731" meta:non-whitespace-character-count="2356"/>
  </office:meta>
</office:document-meta>
</file>