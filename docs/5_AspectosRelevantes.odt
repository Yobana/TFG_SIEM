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B40000027D9576CF7D.png" manifest:media-type="image/png"/>
  <manifest:file-entry manifest:full-path="Pictures/1000000000000600000004009ABBCFE4.png" manifest:media-type="image/png"/>
  <manifest:file-entry manifest:full-path="Pictures/10000000000005B10000038BCAEF96E7.png" manifest:media-type="image/png"/>
  <manifest:file-entry manifest:full-path="Pictures/10000000000005980000011468D8AE8B.png" manifest:media-type="image/png"/>
  <manifest:file-entry manifest:full-path="Pictures/10000001000000F200000222295DE5B6.png" manifest:media-type="image/png"/>
  <manifest:file-entry manifest:full-path="Pictures/100000010000072D0000034EBA8F250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Heading_20_1" style:master-page-name="Standard">
      <style:paragraph-properties style:page-number="auto"/>
    </style:style>
    <style:style style:name="P2" style:family="paragraph" style:parent-style-name="UBUcuerpoTrabajo">
      <style:paragraph-properties fo:margin-left="0cm" fo:text-indent="0cm" style:auto-text-indent="false"/>
    </style:style>
    <style:style style:name="P3" style:family="paragraph" style:parent-style-name="UBUcuerpoTrabajo">
      <style:paragraph-properties fo:margin-left="0cm" fo:text-indent="0cm" style:auto-text-indent="false"/>
      <style:text-properties officeooo:rsid="0010ec01" officeooo:paragraph-rsid="0010ec01"/>
    </style:style>
    <style:style style:name="P4" style:family="paragraph" style:parent-style-name="Heading_20_2">
      <style:text-properties officeooo:rsid="0010ec01" officeooo:paragraph-rsid="0010ec01"/>
    </style:style>
    <style:style style:name="P5" style:family="paragraph" style:parent-style-name="Text_20_body">
      <style:text-properties officeooo:paragraph-rsid="0010ec01"/>
    </style:style>
    <style:style style:name="P6" style:family="paragraph" style:parent-style-name="Text_20_body">
      <style:text-properties officeooo:rsid="0022d636" officeooo:paragraph-rsid="0022d636"/>
    </style:style>
    <style:style style:name="P7" style:family="paragraph" style:parent-style-name="Text_20_body">
      <style:text-properties officeooo:rsid="00161309" officeooo:paragraph-rsid="00161309"/>
    </style:style>
    <style:style style:name="P8" style:family="paragraph" style:parent-style-name="Text_20_body" style:list-style-name="L1"/>
    <style:style style:name="P9" style:family="paragraph" style:parent-style-name="Heading_20_2">
      <style:text-properties officeooo:paragraph-rsid="0010ec01"/>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2"/>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3"/>
    <style:style style:name="P14" style:family="paragraph" style:parent-style-name="Heading_20_2">
      <style:text-properties officeooo:rsid="0010ec01" officeooo:paragraph-rsid="00157e1a"/>
    </style:style>
    <style:style style:name="P15" style:family="paragraph" style:parent-style-name="Text_20_body">
      <style:text-properties officeooo:paragraph-rsid="00157e1a"/>
    </style:style>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4"/>
    <style:style style:name="P18" style:family="paragraph" style:parent-style-name="Text_20_body" style:list-style-name="L5">
      <style:paragraph-properties fo:margin-top="0cm" fo:margin-bottom="0cm" style:contextual-spacing="false"/>
    </style:style>
    <style:style style:name="P19" style:family="paragraph" style:parent-style-name="Text_20_body" style:list-style-name="L5"/>
    <style:style style:name="P20" style:family="paragraph" style:parent-style-name="Heading_20_2">
      <style:text-properties officeooo:rsid="0010ec01" officeooo:paragraph-rsid="0019974c"/>
    </style:style>
    <style:style style:name="P21" style:family="paragraph" style:parent-style-name="Text_20_body">
      <style:text-properties officeooo:paragraph-rsid="0019974c"/>
    </style:style>
    <style:style style:name="P22" style:family="paragraph" style:parent-style-name="Text_20_body" style:list-style-name="L6">
      <style:paragraph-properties fo:margin-top="0cm" fo:margin-bottom="0cm" style:contextual-spacing="false"/>
    </style:style>
    <style:style style:name="P23" style:family="paragraph" style:parent-style-name="Text_20_body" style:list-style-name="L6"/>
    <style:style style:name="P24" style:family="paragraph" style:parent-style-name="Text_20_body">
      <style:text-properties officeooo:paragraph-rsid="00256256"/>
    </style:style>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7"/>
    <style:style style:name="P27" style:family="paragraph" style:parent-style-name="Text_20_body" style:list-style-name="L8">
      <style:paragraph-properties fo:margin-top="0cm" fo:margin-bottom="0cm" style:contextual-spacing="false"/>
    </style:style>
    <style:style style:name="P28" style:family="paragraph" style:parent-style-name="Text_20_body" style:list-style-name="L8"/>
    <style:style style:name="P29" style:family="paragraph" style:parent-style-name="Text_20_body" style:list-style-name="L9">
      <style:paragraph-properties fo:margin-top="0cm" fo:margin-bottom="0cm" style:contextual-spacing="false"/>
    </style:style>
    <style:style style:name="P30" style:family="paragraph" style:parent-style-name="Text_20_body" style:list-style-name="L9"/>
    <style:style style:name="P31" style:family="paragraph" style:parent-style-name="Text_20_body" style:list-style-name="L10">
      <style:paragraph-properties fo:margin-top="0cm" fo:margin-bottom="0cm" style:contextual-spacing="false"/>
    </style:style>
    <style:style style:name="P32" style:family="paragraph" style:parent-style-name="Text_20_body" style:list-style-name="L10"/>
    <style:style style:name="P33" style:family="paragraph" style:parent-style-name="Text_20_body" style:list-style-name="L11">
      <style:paragraph-properties fo:margin-top="0cm" fo:margin-bottom="0cm" style:contextual-spacing="false"/>
    </style:style>
    <style:style style:name="P34" style:family="paragraph" style:parent-style-name="Text_20_body" style:list-style-name="L11"/>
    <style:style style:name="P35" style:family="paragraph" style:parent-style-name="Text_20_body" style:list-style-name="L12">
      <style:paragraph-properties fo:margin-top="0cm" fo:margin-bottom="0cm" style:contextual-spacing="false"/>
    </style:style>
    <style:style style:name="P36" style:family="paragraph" style:parent-style-name="Text_20_body" style:list-style-name="L12"/>
    <style:style style:name="P37" style:family="paragraph" style:parent-style-name="Heading_20_2">
      <style:text-properties officeooo:rsid="0010ec01" officeooo:paragraph-rsid="001acc3a"/>
    </style:style>
    <style:style style:name="P38" style:family="paragraph" style:parent-style-name="Text_20_body">
      <style:text-properties officeooo:paragraph-rsid="001acc3a"/>
    </style:style>
    <style:style style:name="P39" style:family="paragraph" style:parent-style-name="Text_20_body" style:list-style-name="L13">
      <style:paragraph-properties fo:margin-top="0cm" fo:margin-bottom="0cm" style:contextual-spacing="false"/>
    </style:style>
    <style:style style:name="P40" style:family="paragraph" style:parent-style-name="Text_20_body" style:list-style-name="L13"/>
    <style:style style:name="P41" style:family="paragraph" style:parent-style-name="Text_20_body" style:list-style-name="L14">
      <style:paragraph-properties fo:margin-top="0cm" fo:margin-bottom="0cm" style:contextual-spacing="false"/>
    </style:style>
    <style:style style:name="P42" style:family="paragraph" style:parent-style-name="Text_20_body" style:list-style-name="L14"/>
    <style:style style:name="P43" style:family="paragraph" style:parent-style-name="Text_20_body">
      <style:text-properties officeooo:paragraph-rsid="001ef16b"/>
    </style:style>
    <style:style style:name="P44" style:family="paragraph" style:parent-style-name="Heading_20_2">
      <style:text-properties officeooo:rsid="0010ec01" officeooo:paragraph-rsid="001ef16b"/>
    </style:style>
    <style:style style:name="T1" style:family="text">
      <style:text-properties officeooo:rsid="0012d8df"/>
    </style:style>
    <style:style style:name="T2" style:family="text">
      <style:text-properties officeooo:rsid="0017ede5"/>
    </style:style>
    <style:style style:name="T3" style:family="text">
      <style:text-properties officeooo:rsid="0010ec01"/>
    </style:style>
    <style:style style:name="T4" style:family="text">
      <style:text-properties officeooo:rsid="00148a15"/>
    </style:style>
    <style:style style:name="T5" style:family="text">
      <style:text-properties officeooo:rsid="00157e1a"/>
    </style:style>
    <style:style style:name="T6" style:family="text">
      <style:text-properties officeooo:rsid="0022d636"/>
    </style:style>
    <style:style style:name="T7" style:family="text">
      <style:text-properties officeooo:rsid="0019974c"/>
    </style:style>
    <style:style style:name="T8" style:family="text">
      <style:text-properties officeooo:rsid="0024e68d"/>
    </style:style>
    <style:style style:name="T9" style:family="text">
      <style:text-properties officeooo:rsid="0024f474"/>
    </style:style>
    <style:style style:name="T10" style:family="text">
      <style:text-properties officeooo:rsid="00256256"/>
    </style:style>
    <style:style style:name="T11" style:family="text">
      <style:text-properties officeooo:rsid="001acc3a"/>
    </style:style>
    <style:style style:name="T12" style:family="text">
      <style:text-properties officeooo:rsid="001ef16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spectos relevantes del desarrollo del proyecto </text:h>
      <text:p text:style-name="P2">El proyecto desarrollado consiste en el diseño e implementación de un sistema SIEM (Security Information and Event Management) orientado a la monitorización de un entorno simulado de alta seguridad, concretamente un polvorín militar.</text:p>
      <text:p text:style-name="UBUcuerpoTrabajo"/>
      <text:p text:style-name="P2">El sistema es capaz de recoger eventos generados por diferentes dispositivos, procesarlos y analizarlos con el objetivo de detectar posibles incidentes de seguridad.</text:p>
      <text:p text:style-name="UBUcuerpoTrabajo"/>
      <text:p text:style-name="P2">Para ello, se ha diseñado una arquitectura modular que permite separar las distintas funcionalidades del sistema, facilitando su desarrollo, mantenimiento y futura ampliación.</text:p>
      <text:p text:style-name="UBUcuerpoTrabajo"/>
      <text:p text:style-name="P2">El entorno simulado incluye diferentes elementos de seguridad física y lógica, como sistemas de control de acceso mediante tarjeta, sensores de movimiento, sensores de apertura de puertas, sensores ambientales y sistemas de control eléctrico.</text:p>
      <text:p text:style-name="UBUcuerpoTrabajo"/>
      <text:p text:style-name="P2">Todos estos elementos generan eventos que son procesados por el sistema SIEM, permitiendo obtener una visión global del estado del sistema y detectar situaciones anómalas.</text:p>
      <text:p text:style-name="P3">­</text:p>
      <text:h text:style-name="P4" text:outline-level="2">5.2 Entorno del Polvorín (simulado)</text:h>
      <text:p text:style-name="P5">El sistema desarrollado se basa en la simulación de un polvorín, entendido como una instalación destinada al almacenamiento de material sensible y que requiere un alto nivel de seguridad tanto física como lógica.</text:p>
      <text:p text:style-name="P5"/>
      <text:p text:style-name="P5">El polvorín está compuesto por diferentes zonas claramente diferenciadas. En primer lugar, se dispone de un acceso principal controlado mediante un torno de seguridad y un sistema de autenticación por tarjeta. Este punto permite controlar qué usuarios acceden a la instalación.</text:p>
      <text:p text:style-name="P5"/>
      <text:p text:style-name="P5">En el interior del recinto se encuentran varios depósitos independientes, identificados como D01, D02, etc., en los que se almacena el material. Cada uno de estos depósitos dispone de su propio sistema de control de acceso mediante lector de tarjeta, así como sensores de seguridad asociados.</text:p>
      <text:p text:style-name="P5"/>
      <text:p text:style-name="P5">Antes del acceso a cada depósito se ha considerado la presencia de sensores volumétricos de movimiento, capaces de detectar la presencia de personas en zonas restringidas.</text:p>
      <text:p text:style-name="P5"/>
      <text:p text:style-name="P5">Además, cada depósito cuenta con sensores magnéticos de apertura de puertas, sensores de temperatura y sensores de humedad, con el objetivo de monitorizar tanto la seguridad física como las condiciones ambientales.</text:p>
      <text:p text:style-name="P5"/>
      <text:p text:style-name="P5">Por otro lado, el sistema incluye un edificio técnico encargado de gestionar la infraestructura eléctrica del polvorín. En este edificio se dispone de un transformador principal y un grupo electrógeno, diseñado para garantizar el suministro eléctrico en caso de fallo de la red general.</text:p>
      <text:p text:style-name="P5"/>
      <text:p text:style-name="P5">Todos estos elementos generan eventos que son registrados en forma de logs y procesados por el sistema SIEM, permitiendo la monitorización continua del estado de la instalación.</text:p>
      <text:p text:style-name="P6"><draw:frame draw:style-name="fr1" draw:name="Imagen6" text:anchor-type="char" svg:width="16.501cm" svg:height="11cm" draw:z-index="5"><draw:image xlink:href="Pictures/1000000000000600000004009ABBCFE4.png" xlink:type="simple" xlink:show="embed" xlink:actuate="onLoad" draw:mime-type="image/png"/></draw:frame><text:soft-page-break/>Figura 1. Plano general del Polvorín militar simulado.</text:p>
      <text:p text:style-name="P7">*PENDIENTE AÑADIR</text:p>
      <text:p text:style-name="P7">Cámaras (modelo)</text:p>
      <text:p text:style-name="P7">Torno de acceso</text:p>
      <text:p text:style-name="P7">Sensores (temperatura, humedad, etc.)</text:p>
      <text:p text:style-name="P7"/>
      <text:h text:style-name="P4" text:outline-level="2">5.3 <text:span text:style-name="T1">Estructura de eventos</text:span></text:h>
      <text:p text:style-name="Text_20_body">Para poder procesar los eventos generados en el entorno simulado, se ha definido una estructura de eventos normalizada que permite representar de forma consistente la información relevante de cada suceso.</text:p>
      <text:p text:style-name="Text_20_body">Cada evento se representa mediante un conjunto de campos que recogen información sobre el origen, el tipo de evento, su severidad y otros datos necesarios para su análisis.</text:p>
      <text:p text:style-name="Text_20_body">La estructura definida es la siguiente:</text:p>
      <text:p text:style-name="Text_20_body">timestamp | <text:span text:style-name="T2">event_</text:span>source | event_type | severity | user_id | access_point | deposit_id | device_id | result | message</text:p>
      <text:p text:style-name="Text_20_body">Donde cada uno de los campos representa:</text:p>
      <text:list text:style-name="L1">
        <text:list-item>
          <text:p text:style-name="P8">timestamp: fecha y hora en la que se produce el evento.</text:p>
        </text:list-item>
        <text:list-item>
          <text:p text:style-name="P8"><text:span text:style-name="T2">event_</text:span>source: origen del evento, como puede ser un torno, un sensor o un sistema.</text:p>
        </text:list-item>
        <text:list-item>
          <text:p text:style-name="P8">event_type: tipo de evento (acceso, intrusión, evento ambiental, sistema, etc.).</text:p>
        </text:list-item>
        <text:list-item>
          <text:p text:style-name="P8">severity: nivel de criticidad del evento (INFO, WARNING, ERROR, CRITICAL).</text:p>
        </text:list-item>
        <text:list-item>
          <text:p text:style-name="P8">user_id: identificador del usuario asociado al evento, en caso de existir.</text:p>
        </text:list-item>
        <text:list-item>
          <text:p text:style-name="P8">access_point: ubicación dentro del sistema donde ocurre el evento.</text:p>
        </text:list-item>
        <text:list-item>
          <text:p text:style-name="P8"><text:soft-page-break/>deposit_id: identificador del depósito afectado, si aplica.</text:p>
        </text:list-item>
        <text:list-item>
          <text:p text:style-name="P8">device_id: identificador del dispositivo que genera el evento.</text:p>
        </text:list-item>
        <text:list-item>
          <text:p text:style-name="P8">result: resultado del evento (acceso permitido, denegado, detección, fallo, etc.).</text:p>
        </text:list-item>
        <text:list-item>
          <text:p text:style-name="P8">message: descripción textual del evento.</text:p>
        </text:list-item>
      </text:list>
      <text:p text:style-name="Text_20_body">Esta estructura permite representar de forma completa eventos de distinta naturaleza, como accesos autorizados o denegados, detección de movimiento, apertura de puertas, condiciones ambientales anómalas o fallos del sistema.</text:p>
      <text:p text:style-name="Text_20_body">El uso de un formato estructurado facilita el procesamiento automático de los eventos y permite aplicar reglas de correlación para la detección de incidentes de seguridad.</text:p>
      <text:p text:style-name="Text_20_body">Para la generación de los eventos simulados, se ha utilizado una herramienta de inteligencia artificial como apoyo, con el objetivo de crear un conjunto de logs realistas de forma más eficiente.</text:p>
      <text:p text:style-name="Text_20_body"/>
      <text:p text:style-name="Text_20_body">El uso de esta herramienta ha permitido definir diferentes escenarios de eventos coherentes con el entorno del polvorín, incluyendo accesos, eventos de sensores y situaciones de fallo.</text:p>
      <text:p text:style-name="Text_20_body"/>
      <text:p text:style-name="Text_20_body">No obstante, la estructura de los eventos, los campos utilizados y su interpretación han sido definidos manualmente como parte del diseño del sistema, siendo la inteligencia artificial únicamente un apoyo en la generación de datos de prueba.</text:p>
      <text:p text:style-name="Text_20_body"/>
      <text:p text:style-name="Text_20_body"/>
      <text:h text:style-name="P4" text:outline-level="2"/>
      <text:h text:style-name="P9" text:outline-level="2"><text:span text:style-name="T3">5.</text:span><text:span text:style-name="T1">4 </text:span><text:span text:style-name="T4">Ingestor de logs</text:span></text:h>
      <text:p text:style-name="Text_20_body">El módulo de ingesta es el encargado de leer los ficheros de logs generados por el entorno simulado y convertir cada línea en un evento estructurado que pueda ser procesado por el sistema SIEM.</text:p>
      <text:p text:style-name="Text_20_body">En este proyecto, el ingestor se ha implementado en Python. Su funcionamiento consiste en abrir el fichero de logs, leer cada línea, separar los campos mediante el carácter “|” y validar que el evento cumple con la estructura definida de 10 campos.</text:p>
      <text:p text:style-name="Text_20_body">Si la línea cumple el formato esperado, el sistema genera un diccionario con los datos normalizados del evento, incluyendo la fecha, origen, tipo de evento, severidad, usuario, punto de acceso, depósito, dispositivo, resultado y mensaje descriptivo.</text:p>
      <text:p text:style-name="Text_20_body">En caso de que una línea no cumpla con el formato establecido, el ingestor la ignora y muestra un aviso. De esta forma se evita que un evento mal formado interrumpa la ejecución del sistema.</text:p>
      <text:p text:style-name="Text_20_body">Este módulo constituye una parte fundamental del SIEM, ya que transforma los logs en información estructurada que posteriormente podrá ser almacenada y analizada por el motor de correlación.</text:p>
      <text:p text:style-name="Text_20_body"/>
      <text:h text:style-name="P4" text:outline-level="2">5.<text:span text:style-name="T1">5 </text:span><text:span text:style-name="T4">Motor de correlación de eventos</text:span></text:h>
      <text:p text:style-name="P5">El sistema desarrollado incorpora un motor básico de correlación encargado de analizar los eventos procesados por el módulo de ingesta y detectar situaciones potencialmente peligrosas <text:soft-page-break/>dentro del entorno simulado del polvorín.</text:p>
      <text:p text:style-name="Text_20_body">La correlación de eventos constituye uno de los elementos fundamentales de los sistemas SIEM, ya que permite identificar incidentes de seguridad mediante el análisis conjunto de múltiples eventos relacionados.</text:p>
      <text:p text:style-name="Text_20_body">Para ello, se implementó el módulo <text:span text:style-name="Source_20_Text">engine.py</text:span>, encargado de aplicar diferentes reglas de correlación sobre los eventos normalizados.</text:p>
      <text:p text:style-name="Text_20_body">Actualmente el sistema es capaz de detectar distintos escenarios de seguridad, entre los que destacan:</text:p>
      <text:list text:style-name="L2">
        <text:list-item>
          <text:p text:style-name="P10">Aperturas de puertas en depósitos. </text:p>
        </text:list-item>
        <text:list-item>
          <text:p text:style-name="P10">Detección de movimiento mediante sensores volumétricos. </text:p>
        </text:list-item>
        <text:list-item>
          <text:p text:style-name="P10">Temperaturas elevadas. </text:p>
        </text:list-item>
        <text:list-item>
          <text:p text:style-name="P10">Humedad excesiva. </text:p>
        </text:list-item>
        <text:list-item>
          <text:p text:style-name="P10">Fallos de comunicación con sensores. </text:p>
        </text:list-item>
        <text:list-item>
          <text:p text:style-name="P10">Caídas del sistema eléctrico. </text:p>
        </text:list-item>
        <text:list-item>
          <text:p text:style-name="P11">Eventos de intrusión detectados por cámaras perimetrales. </text:p>
        </text:list-item>
      </text:list>
      <text:p text:style-name="Text_20_body"/>
      <text:p text:style-name="Text_20_body"/>
      <text:p text:style-name="Text_20_body"/>
      <text:p text:style-name="Text_20_body">Cuando una regla de correlación detecta una situación anómala, el sistema genera automáticamente una alerta estructurada con información sobre:</text:p>
      <text:list text:style-name="L3">
        <text:list-item>
          <text:p text:style-name="P12">Tipo de alerta. </text:p>
        </text:list-item>
        <text:list-item>
          <text:p text:style-name="P12">Severidad. </text:p>
        </text:list-item>
        <text:list-item>
          <text:p text:style-name="P12">Depósito afectado. </text:p>
        </text:list-item>
        <text:list-item>
          <text:p text:style-name="P12">Dispositivo implicado. </text:p>
        </text:list-item>
        <text:list-item>
          <text:p text:style-name="P13">Descripción del incidente. </text:p>
        </text:list-item>
      </text:list>
      <text:p text:style-name="Text_20_body">Además, el motor de correlación fue diseñado siguiendo una arquitectura modular que permitirá incorporar nuevas reglas y mecanismos de análisis en futuras fases del proyecto.</text:p>
      <text:p text:style-name="Text_20_body"><draw:frame draw:style-name="fr1" draw:name="Imagen2" text:anchor-type="char" svg:width="16.501cm" svg:height="10.271cm" draw:z-index="1"><draw:image xlink:href="Pictures/10000000000005B10000038BCAEF96E7.png" xlink:type="simple" xlink:show="embed" xlink:actuate="onLoad" draw:mime-type="image/png"/></draw:frame></text:p>
      <text:p text:style-name="P5"><text:soft-page-break/></text:p>
      <text:p text:style-name="P5"/>
      <text:p text:style-name="P5"/>
      <text:p text:style-name="P5"/>
      <text:h text:style-name="P14" text:outline-level="2"><draw:frame draw:style-name="fr1" draw:name="Imagen4" text:anchor-type="char" svg:width="16.501cm" svg:height="3.18cm" draw:z-index="2"><draw:image xlink:href="Pictures/10000000000005980000011468D8AE8B.png" xlink:type="simple" xlink:show="embed" xlink:actuate="onLoad" draw:mime-type="image/png"/></draw:frame></text:h>
      <text:h text:style-name="P14" text:outline-level="2">5.<text:span text:style-name="T5">6 Arquitectura del sistema</text:span></text:h>
      <text:p text:style-name="P15">El sistema SIEM desarrollado se diseñó siguiendo una arquitectura modular, en la que cada componente dispone de una responsabilidad específica dentro del funcionamiento general del sistema.</text:p>
      <text:p text:style-name="Text_20_body">Este enfoque permite separar las distintas funcionalidades del proyecto, facilitando tanto el mantenimiento como la escalabilidad futura de la aplicación.</text:p>
      <text:p text:style-name="Text_20_body">La arquitectura actual del sistema se encuentra dividida en varios módulos principales:</text:p>
      <text:list text:style-name="L4">
        <text:list-item>
          <text:p text:style-name="P16"><text:span text:style-name="Source_20_Text">ingestor/</text:span><text:line-break/>Encargado de la lectura y normalización de eventos procedentes de los logs simulados. </text:p>
        </text:list-item>
        <text:list-item>
          <text:p text:style-name="P16"><text:span text:style-name="Source_20_Text">correlation/</text:span><text:line-break/>Responsable del análisis y correlación de eventos para la detección de incidentes de seguridad. </text:p>
        </text:list-item>
        <text:list-item>
          <text:p text:style-name="P16"><text:span text:style-name="Source_20_Text">sensors/</text:span><text:line-break/>Gestiona la monitorización y estado de los sensores simulados del sistema. </text:p>
        </text:list-item>
        <text:list-item>
          <text:p text:style-name="P16"><text:span text:style-name="Source_20_Text">db/</text:span><text:line-break/>Implementa el almacenamiento persistente de eventos y alertas mediante SQLite. </text:p>
        </text:list-item>
        <text:list-item>
          <text:p text:style-name="P16"><text:span text:style-name="Source_20_Text">config/</text:span><text:line-break/>Centraliza la configuración general del sistema y los límites ambientales utilizados por el motor de correlación. </text:p>
        </text:list-item>
        <text:list-item>
          <text:p text:style-name="P16"><text:span text:style-name="Source_20_Text">logs/</text:span><text:line-break/>Contiene los ficheros de eventos simulados utilizados durante las pruebas del sistema. </text:p>
        </text:list-item>
        <text:list-item>
          <text:p text:style-name="P17"><text:span text:style-name="Source_20_Text">main.py</text:span><text:line-break/>Actúa como orquestador principal del SIEM, coordinando la interacción entre todos los módulos. </text:p>
        </text:list-item>
      </text:list>
      <text:p text:style-name="Text_20_body"><draw:frame draw:style-name="fr2" draw:name="Imagen1" text:anchor-type="char" svg:width="3.747cm" svg:height="8.453cm" draw:z-index="0"><draw:image xlink:href="Pictures/10000001000000F200000222295DE5B6.png" xlink:type="simple" xlink:show="embed" xlink:actuate="onLoad" draw:mime-type="image/png"/></draw:frame><text:soft-page-break/>Figura <text:span text:style-name="T6">2</text:span>. Estructura modular del proyecto TFG-SIEM en Visual Studio Code.</text:p>
      <text:p text:style-name="Text_20_body">Como puede observarse en la Figura 5.X, el sistema se encuentra organizado mediante una estructura modular claramente diferenciada, permitiendo separar los distintos componentes funcionales del SIEM.</text:p>
      <text:p text:style-name="Text_20_body"/>
      <text:p text:style-name="Text_20_body">Esta organización facilita tanto el mantenimiento del proyecto como la incorporación futura de nuevas funcionalidades, como dashboards de monitorización, APIs avanzadas o sistemas de análisis mediante Machine Learning.</text:p>
      <text:p text:style-name="Text_20_body"/>
      <text:p text:style-name="Text_20_body">Además, la arquitectura fue diseñada teniendo en cuenta su futura ejecución sobre una Raspberry Pi, priorizando tecnologías ligeras y de bajo consumo de recursos como Python, SQLite y FastAPI.</text:p>
      <text:p text:style-name="Text_20_body">El sistema sigue un flujo de funcionamiento secuencial:</text:p>
      <text:list text:style-name="L5">
        <text:list-item>
          <text:p text:style-name="P18">Lectura de eventos desde los logs. </text:p>
        </text:list-item>
        <text:list-item>
          <text:p text:style-name="P18">Normalización de eventos. </text:p>
        </text:list-item>
        <text:list-item>
          <text:p text:style-name="P18">Procesamiento mediante reglas de correlación. </text:p>
        </text:list-item>
        <text:list-item>
          <text:p text:style-name="P18">Supervisión del estado de sensores. </text:p>
        </text:list-item>
        <text:list-item>
          <text:p text:style-name="P18">Generación de alertas. </text:p>
        </text:list-item>
        <text:list-item>
          <text:p text:style-name="P19">Almacenamiento persistente en SQLite. </text:p>
        </text:list-item>
      </text:list>
      <text:p text:style-name="P15"/>
      <text:h text:style-name="P20" text:outline-level="2">5.<text:span text:style-name="T7">7</text:span><text:span text:style-name="T5"> </text:span><text:span text:style-name="T7">Gestión y monitorización de sensores</text:span></text:h>
      <text:p text:style-name="P21">El sistema incorpora un módulo específico encargado de supervisar el estado de los sensores simulados del entorno del polvorín.</text:p>
      <text:p text:style-name="Text_20_body">Este módulo permite registrar la última comunicación recibida de cada dispositivo y determinar automáticamente si un sensor permanece activo o inactivo en función del tiempo transcurrido desde su última actividad.</text:p>
      <text:p text:style-name="Text_20_body">Para ello, se desarrolló el archivo <text:span text:style-name="Source_20_Text">status_manager.py</text:span>, integrado dentro del módulo <text:span text:style-name="Source_20_Text">sensors/</text:span>.</text:p>
      <text:p text:style-name="Text_20_body">Las principales funciones implementadas son:</text:p>
      <text:list text:style-name="L6">
        <text:list-item>
          <text:p text:style-name="P22"><text:soft-page-break/>Actualización del estado de los sensores cuando se recibe un nuevo evento. </text:p>
        </text:list-item>
        <text:list-item>
          <text:p text:style-name="P22">Registro temporal de la última comunicación de cada dispositivo. </text:p>
        </text:list-item>
        <text:list-item>
          <text:p text:style-name="P22">Detección automática de sensores inactivos mediante un sistema de timeout configurable. </text:p>
        </text:list-item>
        <text:list-item>
          <text:p text:style-name="P23">Consulta del estado actual de los sensores monitorizados. </text:p>
        </text:list-item>
      </text:list>
      <text:p text:style-name="Text_20_body">Actualmente el sistema es capaz de supervisar sensores magnéticos, sensores volumétricos, sensores ambientales y cámaras perimetrales simuladas.</text:p>
      <text:p text:style-name="Text_20_body">Esta funcionalidad permite mejorar el realismo del SIEM desarrollado, ya que no solo se gestionan eventos de seguridad, sino también el estado operativo de los dispositivos encargados de generar dichos eventos.</text:p>
      <text:p text:style-name="P21">Además, esta arquitectura permitirá futuras ampliaciones orientadas a la supervisión avanzada de dispositivos y detección de fallos de comunicación en tiempo real.</text:p>
      <text:p text:style-name="P21"/>
      <text:p text:style-name="P21"><draw:frame draw:style-name="fr2" draw:name="Imagen3" text:anchor-type="char" svg:width="11.94cm" svg:height="10.991cm" draw:z-index="3"><draw:image xlink:href="Pictures/10000000000002B40000027D9576CF7D.png" xlink:type="simple" xlink:show="embed" xlink:actuate="onLoad" draw:mime-type="image/png"/></draw:frame></text:p>
      <text:p text:style-name="P21"/>
      <text:h text:style-name="P20" text:outline-level="2">5.<text:span text:style-name="T7">8</text:span><text:span text:style-name="T5"> </text:span><text:span text:style-name="T7">Configuración ambiental</text:span></text:h>
      <text:p text:style-name="Text_20_body">Con el objetivo de facilitar la configuración del sistema y evitar valores estáticos distribuidos por el código, se implementó un módulo centralizado de configuración mediante el archivo settings.py.</text:p>
      <text:p text:style-name="Text_20_body">Este módulo permite almacenar distintos parámetros generales del SIEM, incluyendo:</text:p>
      <text:p text:style-name="Text_20_body">- Rutas de logs.</text:p>
      <text:p text:style-name="Text_20_body">- Configuración de la base de datos.</text:p>
      <text:p text:style-name="Text_20_body">- Parámetros de la API.</text:p>
      <text:p text:style-name="Text_20_body">- Límites ambientales de temperatura y humedad.</text:p>
      <text:p text:style-name="Text_20_body"/>
      <text:p text:style-name="Text_20_body"><text:soft-page-break/>En el caso de los sensores ambientales, se definieron valores máximos y mínimos permitidos para temperatura y humedad, utilizados posteriormente por el motor de correlación para generar alertas automáticas cuando se detectan condiciones anómalas.</text:p>
      <text:p text:style-name="Text_20_body"/>
      <text:p text:style-name="Text_20_body">Esta aproximación aporta varias ventajas:</text:p>
      <text:p text:style-name="Text_20_body"/>
      <text:p text:style-name="Text_20_body">- Facilita el mantenimiento del sistema.</text:p>
      <text:p text:style-name="Text_20_body">- Permite modificar parámetros sin alterar la lógica interna del SIEM.</text:p>
      <text:p text:style-name="Text_20_body">- Mejora la escalabilidad del proyecto.</text:p>
      <text:p text:style-name="Text_20_body">- Centraliza la configuración general de la aplicación.</text:p>
      <text:p text:style-name="Text_20_body"/>
      <text:p text:style-name="Text_20_body">Actualmente los límites ambientales configurados son utilizados durante el análisis de eventos procedentes de sensores ambientales simulados del entorno del polvorín.</text:p>
      <text:p text:style-name="Text_20_body"/>
      <text:p text:style-name="Text_20_body">Para definir estos valores se tomaron como referencia documentos técnicos relacionados con el almacenamiento seguro de munición y explosivos. Entre ellos destaca el STANAG 4440, que recoge directrices OTAN para el almacenamiento de munición militar y explosivos y toma como estándar asociado la AASTP-1. <text:span text:style-name="T8">PONER ENLACE</text:span></text:p>
      <text:p text:style-name="Text_20_body"/>
      <text:p text:style-name="Text_20_body">Además, las guías IATG recomiendan que los almacenes de explosivos estén diseñados para que la temperatura interior rara vez sea inferior a 5 ºC o superior a 25 ºC, y que la humedad relativa no supere el 75 %. <text:span text:style-name="T8">PONER ENLACE</text:span></text:p>
      <text:p text:style-name="Text_20_body"/>
      <text:p text:style-name="P24">A partir de estas referencias, en el sistema desarrollado se han establecido umbrales preventivos de alerta de <text:span text:style-name="T9">2</text:span>5 ºC para temperatura <text:span text:style-name="T10">máxima, 5 <text:s/>ºC para temperatura mínima </text:span>y <text:span text:style-name="T9">75</text:span> % para humedad relativa <text:span text:style-name="T10">máxima y 20% la mínima</text:span>. Estos valores no representan límites operativos reales de una instalación concreta, sino umbrales simulados para generar eventos anómalos y validar el funcionamiento del motor de correlación.</text:p>
      <text:p text:style-name="Text_20_body"/>
      <text:p text:style-name="Text_20_body">Además, esta estructura permitirá futuras ampliaciones orientadas a la incorporación de configuraciones dinámicas mediante aplicaciones externas o interfaces de administración.</text:p>
      <text:p text:style-name="P21"/>
      <text:h text:style-name="P20" text:outline-level="2">5.<text:span text:style-name="T7">9</text:span><text:span text:style-name="T5"> </text:span><text:span text:style-name="T7">Persistencia de eventos mediante SQLite</text:span></text:h>
      <text:p text:style-name="P21">Con el objetivo de dotar al sistema SIEM de capacidad de almacenamiento persistente, se implementó un módulo de base de datos utilizando SQLite.</text:p>
      <text:p text:style-name="Text_20_body">La utilización de SQLite permite almacenar tanto los eventos procesados por el sistema como las alertas generadas por el motor de correlación, manteniendo un histórico persistente de la actividad monitorizada.</text:p>
      <text:p text:style-name="Text_20_body">Se optó por SQLite debido a varias razones:</text:p>
      <text:list text:style-name="L7">
        <text:list-item>
          <text:p text:style-name="P25">Facilidad de integración con Python. </text:p>
        </text:list-item>
        <text:list-item>
          <text:p text:style-name="P25">Bajo consumo de recursos. </text:p>
        </text:list-item>
        <text:list-item>
          <text:p text:style-name="P25">Simplicidad de despliegue. </text:p>
        </text:list-item>
        <text:list-item>
          <text:p text:style-name="P26"><text:soft-page-break/>Adecuación a entornos ligeros como Raspberry Pi. </text:p>
        </text:list-item>
      </text:list>
      <text:p text:style-name="Text_20_body">Esto permite que el sistema pueda ejecutarse en dispositivos de bajo coste y reducido consumo energético manteniendo un funcionamiento estable.</text:p>
      <text:p text:style-name="Text_20_body">Para ello, se desarrolló la clase <text:span text:style-name="Source_20_Text">DatabaseManager</text:span>, encargada de:</text:p>
      <text:list text:style-name="L8">
        <text:list-item>
          <text:p text:style-name="P27">Crear automáticamente las tablas necesarias del sistema. </text:p>
        </text:list-item>
        <text:list-item>
          <text:p text:style-name="P27">Gestionar la conexión con la base de datos. </text:p>
        </text:list-item>
        <text:list-item>
          <text:p text:style-name="P27">Almacenar eventos normalizados. </text:p>
        </text:list-item>
        <text:list-item>
          <text:p text:style-name="P28">Registrar alertas generadas por el sistema SIEM. </text:p>
        </text:list-item>
      </text:list>
      <text:p text:style-name="Text_20_body">La base de datos utilizada se denomina <text:span text:style-name="Source_20_Text">siem.db</text:span> y forma parte de la estructura modular del proyecto.</text:p>
      <text:p text:style-name="Text_20_body">Actualmente el sistema es capaz de almacenar de forma persistente más de un centenar de eventos simulados, incluyendo:</text:p>
      <text:list text:style-name="L9">
        <text:list-item>
          <text:p text:style-name="P29">Eventos de control de acceso. </text:p>
        </text:list-item>
        <text:list-item>
          <text:p text:style-name="P29">Eventos ambientales. </text:p>
        </text:list-item>
        <text:list-item>
          <text:p text:style-name="P29">Intrusiones. </text:p>
        </text:list-item>
        <text:list-item>
          <text:p text:style-name="P29">Eventos de cámaras perimetrales. </text:p>
        </text:list-item>
        <text:list-item>
          <text:p text:style-name="P30">Fallos eléctricos y de comunicación. </text:p>
        </text:list-item>
      </text:list>
      <text:p text:style-name="Text_20_body">Además, el almacenamiento persistente permitirá futuras ampliaciones del proyecto, como el desarrollo de APIs REST, dashboards de monitorización y sistemas avanzados de análisis de eventos.</text:p>
      <text:p text:style-name="P21">La Figura ? muestra un ejemplo del almacenamiento de eventos y alertas dentro de la base de datos SQLite utilizada por el sistema. La Figura ? muestra un ejemplo del almacenamiento de eventos y alertas dentro de la base de datos SQLite utilizada por el sistema.</text:p>
      <text:p text:style-name="P21"/>
      <text:h text:style-name="P20" text:outline-level="2">5.<text:span text:style-name="T7">10 Simulación de eventos y generación de logs</text:span></text:h>
      <text:p text:style-name="P21">Para poder evaluar el funcionamiento del sistema SIEM desarrollado, se diseñó un entorno simulado de generación de eventos basado en un polvorín militar.</text:p>
      <text:p text:style-name="Text_20_body">El sistema utiliza un fichero de logs denominado <text:span text:style-name="Source_20_Text">polvorin.log</text:span>, encargado de almacenar eventos estructurados generados por distintos dispositivos simulados del entorno.</text:p>
      <text:p text:style-name="Text_20_body">La simulación incluye múltiples tipos de eventos relacionados con:</text:p>
      <text:list text:style-name="L10">
        <text:list-item>
          <text:p text:style-name="P31">Control de accesos. </text:p>
        </text:list-item>
        <text:list-item>
          <text:p text:style-name="P31">Apertura de puertas. </text:p>
        </text:list-item>
        <text:list-item>
          <text:p text:style-name="P31">Sensores volumétricos. </text:p>
        </text:list-item>
        <text:list-item>
          <text:p text:style-name="P31">Sensores ambientales. </text:p>
        </text:list-item>
        <text:list-item>
          <text:p text:style-name="P31">Cámaras perimetrales. </text:p>
        </text:list-item>
        <text:list-item>
          <text:p text:style-name="P31">Sistemas eléctricos. </text:p>
        </text:list-item>
        <text:list-item>
          <text:p text:style-name="P31">Iluminación automática. </text:p>
        </text:list-item>
        <text:list-item>
          <text:p text:style-name="P32">Comunicación entre dispositivos. </text:p>
        </text:list-item>
      </text:list>
      <text:p text:style-name="Text_20_body">Con el objetivo de aumentar el realismo del sistema, los eventos fueron generados teniendo en cuenta patrones horarios coherentes con el funcionamiento habitual de una instalación de este tipo.</text:p>
      <text:p text:style-name="Text_20_body">Por ejemplo:</text:p>
      <text:list text:style-name="L11">
        <text:list-item>
          <text:p text:style-name="P33">Las entradas principales al polvorín se concentran principalmente entre las 07:30 y las 08:00. </text:p>
        </text:list-item>
        <text:list-item>
          <text:p text:style-name="P33">Las salidas se producen principalmente entre las 15:00 y las 15:30. </text:p>
        </text:list-item>
        <text:list-item>
          <text:p text:style-name="P33"><text:soft-page-break/>Los accesos a depósitos se realizan habitualmente entre las 08:30 y las 14:30. </text:p>
        </text:list-item>
        <text:list-item>
          <text:p text:style-name="P34">Durante la tarde y la noche únicamente se registran accesos esporádicos o eventos de mantenimiento. </text:p>
        </text:list-item>
      </text:list>
      <text:p text:style-name="Text_20_body">Además, se incorporaron distintos escenarios de seguridad simulados, incluyendo:</text:p>
      <text:list text:style-name="L12">
        <text:list-item>
          <text:p text:style-name="P35">Accesos autorizados y denegados. </text:p>
        </text:list-item>
        <text:list-item>
          <text:p text:style-name="P35">Detección de movimientos. </text:p>
        </text:list-item>
        <text:list-item>
          <text:p text:style-name="P35">Aperturas de puertas. </text:p>
        </text:list-item>
        <text:list-item>
          <text:p text:style-name="P35">Temperaturas elevadas. </text:p>
        </text:list-item>
        <text:list-item>
          <text:p text:style-name="P35">Humedad excesiva. </text:p>
        </text:list-item>
        <text:list-item>
          <text:p text:style-name="P35">Fallos de comunicación. </text:p>
        </text:list-item>
        <text:list-item>
          <text:p text:style-name="P36">Caídas de suministro eléctrico. </text:p>
        </text:list-item>
      </text:list>
      <text:p text:style-name="Text_20_body">Actualmente el sistema procesa más de un centenar de eventos simulados distribuidos entre distintos depósitos y dispositivos, permitiendo validar el funcionamiento general del SIEM desarrollado.</text:p>
      <text:p text:style-name="P21"/>
      <text:h text:style-name="P37" text:outline-level="2">5.<text:span text:style-name="T7">1</text:span><text:span text:style-name="T11">1</text:span><text:span text:style-name="T7"> </text:span><text:span text:style-name="T11">Gestión de eventos y estructuras de logs</text:span></text:h>
      <text:p text:style-name="P38">Uno de los aspectos más importantes del desarrollo del sistema SIEM fue el diseño de una estructura de eventos homogénea que permitiera representar información procedente de distintos dispositivos y sistemas de seguridad.</text:p>
      <text:p text:style-name="Text_20_body">Para ello, se definió un formato estructurado de logs compuesto por diez campos:</text:p>
      <text:p text:style-name="Text_20_body">timestamp | source | event_type | severity | user_id | access_point | deposit_id | device_id | result | message</text:p>
      <text:p text:style-name="Text_20_body">Cada evento generado por el sistema utiliza esta estructura común, permitiendo que el módulo de ingesta pueda normalizar la información independientemente del origen del evento.</text:p>
      <text:p text:style-name="Text_20_body">Los campos definidos permiten almacenar información relacionada con:</text:p>
      <text:list text:style-name="L13">
        <text:list-item>
          <text:p text:style-name="P39">Fecha y hora del evento. </text:p>
        </text:list-item>
        <text:list-item>
          <text:p text:style-name="P39">Dispositivo o sistema origen. </text:p>
        </text:list-item>
        <text:list-item>
          <text:p text:style-name="P39">Tipo de evento. </text:p>
        </text:list-item>
        <text:list-item>
          <text:p text:style-name="P39">Nivel de severidad. </text:p>
        </text:list-item>
        <text:list-item>
          <text:p text:style-name="P39">Usuario asociado. </text:p>
        </text:list-item>
        <text:list-item>
          <text:p text:style-name="P39">Punto de acceso. </text:p>
        </text:list-item>
        <text:list-item>
          <text:p text:style-name="P39">Depósito afectado. </text:p>
        </text:list-item>
        <text:list-item>
          <text:p text:style-name="P39">Dispositivo implicado. </text:p>
        </text:list-item>
        <text:list-item>
          <text:p text:style-name="P39">Resultado del evento. </text:p>
        </text:list-item>
        <text:list-item>
          <text:p text:style-name="P40">Descripción textual. </text:p>
        </text:list-item>
      </text:list>
      <text:p text:style-name="Text_20_body">Durante el desarrollo del proyecto también se tuvo en cuenta que determinados eventos no siempre disponen de toda la información contextual.</text:p>
      <text:p text:style-name="Text_20_body">Por ejemplo, eventos relacionados con cámaras perimetrales o sistemas eléctricos no requieren necesariamente un identificador de depósito asociado.</text:p>
      <text:p text:style-name="Text_20_body">Por este motivo, el sistema fue diseñado permitiendo campos opcionales o valores vacíos en determinados tipos de eventos, aumentando así la flexibilidad y realismo de la simulación.</text:p>
      <text:p text:style-name="Text_20_body">Esta estructura homogénea facilita:</text:p>
      <text:list text:style-name="L14">
        <text:list-item>
          <text:p text:style-name="P41">El procesamiento automático de eventos. </text:p>
        </text:list-item>
        <text:list-item>
          <text:p text:style-name="P41">La correlación entre distintos dispositivos. </text:p>
        </text:list-item>
        <text:list-item>
          <text:p text:style-name="P41">El almacenamiento persistente en base de datos. </text:p>
        </text:list-item>
        <text:list-item>
          <text:p text:style-name="P41"><text:soft-page-break/>La futura implementación de APIs y dashboards. </text:p>
        </text:list-item>
        <text:list-item>
          <text:p text:style-name="P42">La ampliación del sistema con nuevos dispositivos o sensores. </text:p>
        </text:list-item>
      </text:list>
      <text:p text:style-name="P43">Además, la normalización de eventos constituye uno de los elementos fundamentales en los sistemas SIEM reales, permitiendo centralizar información procedente de múltiples fuentes heterogéneas.</text:p>
      <text:h text:style-name="P44" text:outline-level="2"/>
      <text:h text:style-name="P44" text:outline-level="2">5.<text:span text:style-name="T7">1</text:span><text:span text:style-name="T12">2</text:span><text:span text:style-name="T7"> </text:span><text:span text:style-name="T12">API REST</text:span></text:h>
      <text:p text:style-name="P43">Con el objetivo de facilitar la consulta y visualización de eventos y alertas almacenados por el sistema, se desarrolló una API REST utilizando FastAPI.<text:line-break/><text:line-break/>La elección de FastAPI se debe a su facilidad de integración con Python, su bajo consumo de recursos y la generación automática de documentación interactiva mediante Swagger. Estas características resultan adecuadas para un sistema ligero orientado a su futura ejecución en una Raspberry Pi.<text:line-break/><text:line-break/>La API desarrollada permite consultar información almacenada en la base de datos SQLite del sistema, proporcionando distintos endpoints para acceder a eventos, alertas y estadísticas generales.<text:line-break/><text:line-break/>Entre los endpoints implementados se encuentran:<text:line-break/><text:line-break/>- /events, para consultar eventos almacenados.<text:line-break/>- /events?limit=10, para limitar el número de eventos devueltos.<text:line-break/>- /events/recent, para consultar los eventos más recientes.<text:line-break/>- /alerts, para consultar alertas generadas.<text:line-break/>- /alerts?limit=10, para limitar el número de alertas devueltas.<text:line-break/>- /alerts/severity/CRITICAL, para filtrar alertas por severidad.<text:line-break/>- /stats, para obtener estadísticas generales del sistema.<text:line-break/><text:line-break/>El uso de esta API permite separar la lógica de procesamiento del SIEM de la futura capa de visualización. De esta forma, el dashboard podrá consultar los datos mediante peticiones HTTP sin acceder directamente a la base de datos.<text:line-break/><text:line-break/>Además, FastAPI genera automáticamente una interfaz Swagger que facilita la prueba de los endpoints durante el desarrollo.</text:p>
      <text:p text:style-name="P43"/>
      <text:p text:style-name="P43"><draw:frame draw:style-name="fr3" draw:name="Imagen5" text:anchor-type="char" svg:width="16.501cm" svg:height="7.599cm" draw:z-index="4"><draw:image xlink:href="Pictures/100000010000072D0000034EBA8F2508.png" xlink:type="simple" xlink:show="embed" xlink:actuate="onLoad" draw:mime-type="image/png"/></draw:frame><text:soft-page-break/>Figura . Documentación automática Swagger generada por FastAPI para la API REST del sistema SIEM.</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Droid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UBUcuerpoTrabajo" style:family="paragraph" style:parent-style-name="Text_20_body" style:class="text">
      <style:paragraph-properties fo:margin-left="0cm" fo:margin-right="0cm" fo:margin-top="0cm" fo:margin-bottom="0cm" style:contextual-spacing="false" fo:text-indent="0.499cm" style:auto-text-indent="false"/>
    </style:style>
    <style:style style:name="Heading_20_1" style:display-name="Heading 1" style:family="paragraph" style:parent-style-name="Heading" style:next-style-name="UBUcuerpoTrabajo" style:default-outline-level="1" style:class="chapter">
      <style:paragraph-properties fo:margin-top="0.42cm" fo:margin-bottom="0.21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style="long"/>
      <number:text>/</number:text>
      <number:month number:textual="true"/>
      <number:text>/</number:text>
      <number:year/>
    </number:date-style>
    <number:date-style style:name="N10111" number:language="es" number:country="ES">
      <number:day number:style="long"/>
      <number:text>/</number:text>
      <number:month number:textual="true"/>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499cm" fo:margin-left="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draw:fill-image-width="1cm" draw:fill-image-height="1cm" style:repeat="repeat" draw:fill-image-ref-point-x="0%" draw:fill-image-ref-point-y="0%" draw:fill-image-ref-point="center" draw:tile-repeat-offset="0% vertical"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draw:fill-image-width="1cm" draw:fill-image-height="1cm"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footer>
        <text:p text:style-name="Footer"><text:file-name text:display="name-and-extension">5_AspectosRelevantes.odt</text:file-name><text:s/>v.<text:editing-cycles>30</text:editing-cycles> <text:title/><text:modification-date style:data-style-name="N111">21/may/26</text:modification-date><text:tab/><text:tab/><text:page-number text:select-page="current">8</text:page-number>/<text:page-count>12</text:page-count></text:p>
      </style:footer>
    </style:master-page>
    <style:master-page style:name="Landscape" style:page-layout-name="Mpm2" draw:style-name="Mdp2"/>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pa </meta:initial-creator>
    <meta:creation-date>2014-01-25T22:17:24</meta:creation-date>
    <meta:generator>LibreOffice/26.2.1.2$Windows_X86_64 LibreOffice_project/620$Build-2</meta:generator>
    <dc:date>2026-05-21T23:57:53.904814400</dc:date>
    <meta:editing-duration>PT3H11M33S</meta:editing-duration>
    <meta:editing-cycles>30</meta:editing-cycles>
    <meta:document-statistic meta:table-count="0" meta:image-count="6" meta:object-count="0" meta:page-count="12" meta:paragraph-count="198" meta:word-count="2974" meta:character-count="20146" meta:non-whitespace-character-count="17371"/>
  </office:meta>
</office:document-meta>
</file>