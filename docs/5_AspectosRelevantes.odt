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Heading_20_1" style:master-page-name="Standard">
      <style:paragraph-properties style:page-number="auto"/>
    </style:style>
    <style:style style:name="P2" style:family="paragraph" style:parent-style-name="UBUcuerpoTrabajo">
      <style:paragraph-properties fo:margin-left="0cm" fo:text-indent="0cm" style:auto-text-indent="false"/>
    </style:style>
    <style:style style:name="P3" style:family="paragraph" style:parent-style-name="UBUcuerpoTrabajo">
      <style:paragraph-properties fo:margin-left="0cm" fo:text-indent="0cm" style:auto-text-indent="false"/>
      <style:text-properties officeooo:rsid="0010ec01" officeooo:paragraph-rsid="0010ec01"/>
    </style:style>
    <style:style style:name="P4" style:family="paragraph" style:parent-style-name="Heading_20_2">
      <style:text-properties officeooo:rsid="0010ec01" officeooo:paragraph-rsid="0010ec01"/>
    </style:style>
    <style:style style:name="P5" style:family="paragraph" style:parent-style-name="Text_20_body">
      <style:text-properties officeooo:paragraph-rsid="0010ec01"/>
    </style:style>
    <style:style style:name="P6" style:family="paragraph" style:parent-style-name="Text_20_body">
      <style:text-properties officeooo:rsid="00161309" officeooo:paragraph-rsid="00161309"/>
    </style:style>
    <style:style style:name="P7" style:family="paragraph" style:parent-style-name="Text_20_body" style:list-style-name="L1"/>
    <style:style style:name="P8" style:family="paragraph" style:parent-style-name="Heading_20_2">
      <style:text-properties officeooo:paragraph-rsid="0010ec01"/>
    </style:style>
    <style:style style:name="P9" style:family="paragraph" style:parent-style-name="Heading_20_2">
      <style:text-properties officeooo:rsid="0010ec01" officeooo:paragraph-rsid="00157e1a"/>
    </style:style>
    <style:style style:name="T1" style:family="text">
      <style:text-properties officeooo:rsid="0012d8df"/>
    </style:style>
    <style:style style:name="T2" style:family="text">
      <style:text-properties officeooo:rsid="0010ec01"/>
    </style:style>
    <style:style style:name="T3" style:family="text">
      <style:text-properties officeooo:rsid="00148a15"/>
    </style:style>
    <style:style style:name="T4" style:family="text">
      <style:text-properties officeooo:rsid="00157e1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pectos relevantes del desarrollo del proyecto </text:h>
      <text:p text:style-name="P2">El proyecto desarrollado consiste en el diseño e implementación de un sistema SIEM (Security Information and Event Management) orientado a la monitorización de un entorno simulado de alta seguridad, concretamente un polvorín militar.</text:p>
      <text:p text:style-name="UBUcuerpoTrabajo"/>
      <text:p text:style-name="P2">El sistema es capaz de recoger eventos generados por diferentes dispositivos, procesarlos y analizarlos con el objetivo de detectar posibles incidentes de seguridad.</text:p>
      <text:p text:style-name="UBUcuerpoTrabajo"/>
      <text:p text:style-name="P2">Para ello, se ha diseñado una arquitectura modular que permite separar las distintas funcionalidades del sistema, facilitando su desarrollo, mantenimiento y futura ampliación.</text:p>
      <text:p text:style-name="UBUcuerpoTrabajo"/>
      <text:p text:style-name="P2">El entorno simulado incluye diferentes elementos de seguridad física y lógica, como sistemas de control de acceso mediante tarjeta, sensores de movimiento, sensores de apertura de puertas, sensores ambientales y sistemas de control eléctrico.</text:p>
      <text:p text:style-name="UBUcuerpoTrabajo"/>
      <text:p text:style-name="P2">Todos estos elementos generan eventos que son procesados por el sistema SIEM, permitiendo obtener una visión global del estado del sistema y detectar situaciones anómalas.</text:p>
      <text:p text:style-name="P3">­</text:p>
      <text:h text:style-name="P4" text:outline-level="2">5.2 Entorno del Polvorín (simulado)</text:h>
      <text:p text:style-name="P5">El sistema desarrollado se basa en la simulación de un polvorín, entendido como una instalación destinada al almacenamiento de material sensible y que requiere un alto nivel de seguridad tanto física como lógica.</text:p>
      <text:p text:style-name="P5"/>
      <text:p text:style-name="P5">El polvorín está compuesto por diferentes zonas claramente diferenciadas. En primer lugar, se dispone de un acceso principal controlado mediante un torno de seguridad y un sistema de autenticación por tarjeta. Este punto permite controlar qué usuarios acceden a la instalación.</text:p>
      <text:p text:style-name="P5"/>
      <text:p text:style-name="P5">En el interior del recinto se encuentran varios depósitos independientes, identificados como D01, D02, etc., en los que se almacena el material. Cada uno de estos depósitos dispone de su propio sistema de control de acceso mediante lector de tarjeta, así como sensores de seguridad asociados.</text:p>
      <text:p text:style-name="P5"/>
      <text:p text:style-name="P5">Antes del acceso a cada depósito se ha considerado la presencia de sensores volumétricos de movimiento, capaces de detectar la presencia de personas en zonas restringidas.</text:p>
      <text:p text:style-name="P5"/>
      <text:p text:style-name="P5">Además, cada depósito cuenta con sensores magnéticos de apertura de puertas, sensores de temperatura y sensores de humedad, con el objetivo de monitorizar tanto la seguridad física como las condiciones ambientales.</text:p>
      <text:p text:style-name="P5"/>
      <text:p text:style-name="P5">Por otro lado, el sistema incluye un edificio técnico encargado de gestionar la infraestructura eléctrica del polvorín. En este edificio se dispone de un transformador principal y un grupo electrógeno, diseñado para garantizar el suministro eléctrico en caso de fallo de la red general.</text:p>
      <text:p text:style-name="P5"/>
      <text:p text:style-name="P5">Todos estos elementos generan eventos que son registrados en forma de logs y procesados por el sistema SIEM, permitiendo la monitorización continua del estado de la instalación.</text:p>
      <text:p text:style-name="P5"><text:soft-page-break/></text:p>
      <text:p text:style-name="P6">*PENDIENTE AÑADIR</text:p>
      <text:p text:style-name="P6">Plano del polvorín</text:p>
      <text:p text:style-name="P6">Cámaras (modelo)</text:p>
      <text:p text:style-name="P6">Torno de acceso</text:p>
      <text:p text:style-name="P6">Sensores (temperatura, humedad, etc.)</text:p>
      <text:p text:style-name="P6"/>
      <text:h text:style-name="P4" text:outline-level="2">5.3 <text:span text:style-name="T1">Estructura de eventos</text:span></text:h>
      <text:p text:style-name="Text_20_body">Para poder procesar los eventos generados en el entorno simulado, se ha definido una estructura de eventos normalizada que permite representar de forma consistente la información relevante de cada suceso.</text:p>
      <text:p text:style-name="Text_20_body">Cada evento se representa mediante un conjunto de campos que recogen información sobre el origen, el tipo de evento, su severidad y otros datos necesarios para su análisis.</text:p>
      <text:p text:style-name="Text_20_body">La estructura definida es la siguiente:</text:p>
      <text:p text:style-name="Text_20_body">timestamp | source | event_type | severity | user_id | access_point | deposit_id | device_id | result | message</text:p>
      <text:p text:style-name="Text_20_body">Donde cada uno de los campos representa:</text:p>
      <text:list text:style-name="L1">
        <text:list-item>
          <text:p text:style-name="P7">timestamp: fecha y hora en la que se produce el evento.</text:p>
        </text:list-item>
        <text:list-item>
          <text:p text:style-name="P7">source: origen del evento, como puede ser un torno, un sensor o un sistema.</text:p>
        </text:list-item>
        <text:list-item>
          <text:p text:style-name="P7">event_type: tipo de evento (acceso, intrusión, evento ambiental, sistema, etc.).</text:p>
        </text:list-item>
        <text:list-item>
          <text:p text:style-name="P7">severity: nivel de criticidad del evento (INFO, WARNING, ERROR, CRITICAL).</text:p>
        </text:list-item>
        <text:list-item>
          <text:p text:style-name="P7">user_id: identificador del usuario asociado al evento, en caso de existir.</text:p>
        </text:list-item>
        <text:list-item>
          <text:p text:style-name="P7">access_point: ubicación dentro del sistema donde ocurre el evento.</text:p>
        </text:list-item>
        <text:list-item>
          <text:p text:style-name="P7">deposit_id: identificador del depósito afectado, si aplica.</text:p>
        </text:list-item>
        <text:list-item>
          <text:p text:style-name="P7">device_id: identificador del dispositivo que genera el evento.</text:p>
        </text:list-item>
        <text:list-item>
          <text:p text:style-name="P7">result: resultado del evento (acceso permitido, denegado, detección, fallo, etc.).</text:p>
        </text:list-item>
        <text:list-item>
          <text:p text:style-name="P7">message: descripción textual del evento.</text:p>
        </text:list-item>
      </text:list>
      <text:p text:style-name="Text_20_body">Esta estructura permite representar de forma completa eventos de distinta naturaleza, como accesos autorizados o denegados, detección de movimiento, apertura de puertas, condiciones ambientales anómalas o fallos del sistema.</text:p>
      <text:p text:style-name="Text_20_body">El uso de un formato estructurado facilita el procesamiento automático de los eventos y permite aplicar reglas de correlación para la detección de incidentes de seguridad.</text:p>
      <text:p text:style-name="Text_20_body">Para la generación de los eventos simulados, se ha utilizado una herramienta de inteligencia artificial como apoyo, con el objetivo de crear un conjunto de logs realistas de forma más eficiente.</text:p>
      <text:p text:style-name="Text_20_body"/>
      <text:p text:style-name="Text_20_body">El uso de esta herramienta ha permitido definir diferentes escenarios de eventos coherentes con el entorno del polvorín, incluyendo accesos, eventos de sensores y situaciones de fallo.</text:p>
      <text:p text:style-name="Text_20_body"/>
      <text:p text:style-name="Text_20_body">No obstante, la estructura de los eventos, los campos utilizados y su interpretación han sido <text:soft-page-break/>definidos manualmente como parte del diseño del sistema, siendo la inteligencia artificial únicamente un apoyo en la generación de datos de prueba.</text:p>
      <text:p text:style-name="Text_20_body"/>
      <text:p text:style-name="Text_20_body"/>
      <text:h text:style-name="P4" text:outline-level="2"/>
      <text:h text:style-name="P8" text:outline-level="2"><text:span text:style-name="T2">5.</text:span><text:span text:style-name="T1">4 </text:span><text:span text:style-name="T3">Ingestor de logs</text:span></text:h>
      <text:p text:style-name="Text_20_body">El módulo de ingesta es el encargado de leer los ficheros de logs generados por el entorno simulado y convertir cada línea en un evento estructurado que pueda ser procesado por el sistema SIEM.</text:p>
      <text:p text:style-name="Text_20_body">En este proyecto, el ingestor se ha implementado en Python. Su funcionamiento consiste en abrir el fichero de logs, leer cada línea, separar los campos mediante el carácter “|” y validar que el evento cumple con la estructura definida de 10 campos.</text:p>
      <text:p text:style-name="Text_20_body">Si la línea cumple el formato esperado, el sistema genera un diccionario con los datos normalizados del evento, incluyendo la fecha, origen, tipo de evento, severidad, usuario, punto de acceso, depósito, dispositivo, resultado y mensaje descriptivo.</text:p>
      <text:p text:style-name="Text_20_body">En caso de que una línea no cumpla con el formato establecido, el ingestor la ignora y muestra un aviso. De esta forma se evita que un evento mal formado interrumpa la ejecución del sistema.</text:p>
      <text:p text:style-name="Text_20_body">Este módulo constituye una parte fundamental del SIEM, ya que transforma los logs en información estructurada que posteriormente podrá ser almacenada y analizada por el motor de correlación.</text:p>
      <text:p text:style-name="Text_20_body"/>
      <text:h text:style-name="P4" text:outline-level="2">5.<text:span text:style-name="T1">5 </text:span><text:span text:style-name="T3">Motor de correlación de eventos</text:span></text:h>
      <text:p text:style-name="P5"/>
      <text:h text:style-name="P9" text:outline-level="2">5.<text:span text:style-name="T4">6 Arquitectura del sistema</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UBUcuerpoTrabajo" style:default-outline-level="1" style:class="chapter">
      <style:paragraph-properties fo:margin-top="0.42cm" fo:margin-bottom="0.21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draw:fill-image-width="1cm" draw:fill-image-height="1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draw:fill-image-width="1cm" draw:fill-image-height="1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Footer"><text:file-name text:display="name-and-extension">5_AspectosRelevantes.odt</text:file-name><text:s/>v.<text:editing-cycles>15</text:editing-cycles> <text:title/><text:modification-date style:data-style-name="N111">05/may/26</text:modification-date><text:tab/><text:tab/><text:page-number text:select-page="current">2</text:page-number>/<text:page-count>3</text:page-count></text:p>
      </style:footer>
    </style:master-page>
    <style:master-page style:name="Landscape" style:page-layout-name="Mpm2" draw:style-name="Mdp2"/>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17:24</meta:creation-date>
    <meta:generator>LibreOffice/26.2.1.2$Windows_X86_64 LibreOffice_project/620$Build-2</meta:generator>
    <dc:date>2026-05-05T22:28:48.479416700</dc:date>
    <meta:editing-duration>PT55M27S</meta:editing-duration>
    <meta:editing-cycles>15</meta:editing-cycles>
    <meta:document-statistic meta:table-count="0" meta:image-count="0" meta:object-count="0" meta:page-count="3" meta:paragraph-count="50" meta:word-count="954" meta:character-count="6281" meta:non-whitespace-character-count="5385"/>
  </office:meta>
</office:document-meta>
</file>