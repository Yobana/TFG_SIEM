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jos relacionados </text:h>
      <text:p text:style-name="UBUcuerpoTrabajo">{Este apartado sería parecido a un estado del arte de una tesis o tesina. En un trabajo final grado no parece obligada su presencia, aunque se puede dejar a juicio del tutor el incluir un pequeño resumen comentado de los trabajos y proyectos ya realizados en el campo del proyecto en curso. 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chapter">
      <style:paragraph-properties fo:margin-top="0.42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day number:style="long"/>
      <number:text>/</number:text>
      <number:month number:textual="true"/>
      <number:text>/</number:text>
      <number:year/>
    </number:date-style>
    <number:date-style style:name="N10111" number:language="es" number:country="ES">
      <number:day number:style="long"/>
      <number:text>/</number:text>
      <number:month number:textual="true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6_TrabajosRelacionados.odt</text:file-name><text:s/>v.<text:editing-cycles>8</text:editing-cycles> <text:title/><text:modification-date style:data-style-name="N111">08/may/2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pa </meta:initial-creator>
    <meta:creation-date>2014-01-25T22:16:03</meta:creation-date>
    <meta:generator>LibreOffice/26.2.1.2$Windows_X86_64 LibreOffice_project/620$Build-2</meta:generator>
    <dc:date>2026-05-08T14:04:30.900629600</dc:date>
    <meta:editing-duration>PT6M38S</meta:editing-duration>
    <meta:editing-cycles>8</meta:editing-cycles>
    <meta:document-statistic meta:table-count="0" meta:image-count="0" meta:object-count="0" meta:page-count="1" meta:paragraph-count="3" meta:word-count="59" meta:character-count="359" meta:non-whitespace-character-count="301"/>
  </office:meta>
</office:document-meta>
</file>